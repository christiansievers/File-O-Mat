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ans" svg:font-family="'Ubuntu Sans'" style:font-pitch="variable"/>
  </office:font-face-decls>
  <office:automatic-styles>
    <style:style style:name="co1" style:family="table-column">
      <style:table-column-properties fo:break-before="auto" style:column-width="4.584cm"/>
    </style:style>
    <style:style style:name="co2" style:family="table-column">
      <style:table-column-properties fo:break-before="auto" style:column-width="10.282cm"/>
    </style:style>
    <style:style style:name="co3" style:family="table-column">
      <style:table-column-properties fo:break-before="auto" style:column-width="9.125cm"/>
    </style:style>
    <style:style style:name="co4" style:family="table-column">
      <style:table-column-properties fo:break-before="auto" style:column-width="14.995cm"/>
    </style:style>
    <style:style style:name="co5" style:family="table-column">
      <style:table-column-properties fo:break-before="auto" style:column-width="4.353cm"/>
    </style:style>
    <style:style style:name="co6" style:family="table-column">
      <style:table-column-properties fo:break-before="auto" style:column-width="2.482cm"/>
    </style:style>
    <style:style style:name="co7" style:family="table-column">
      <style:table-column-properties fo:break-before="auto" style:column-width="6.108cm"/>
    </style:style>
    <style:style style:name="co8" style:family="table-column">
      <style:table-column-properties fo:break-before="auto" style:column-width="2.999cm"/>
    </style:style>
    <style:style style:name="co9" style:family="table-column">
      <style:table-column-properties fo:break-before="auto" style:column-width="4.071cm"/>
    </style:style>
    <style:style style:name="co10" style:family="table-column">
      <style:table-column-properties fo:break-before="auto" style:column-width="4.408cm"/>
    </style:style>
    <style:style style:name="co11" style:family="table-column">
      <style:table-column-properties fo:break-before="auto" style:column-width="2.118cm"/>
    </style:style>
    <style:style style:name="co12" style:family="table-column">
      <style:table-column-properties fo:break-before="auto" style:column-width="2.258cm"/>
    </style:style>
    <style:style style:name="co13" style:family="table-column">
      <style:table-column-properties fo:break-before="auto" style:column-width="4.787cm"/>
    </style:style>
    <style:style style:name="co14" style:family="table-column">
      <style:table-column-properties fo:break-before="auto" style:column-width="11.363cm"/>
    </style:style>
    <style:style style:name="co15" style:family="table-column">
      <style:table-column-properties fo:break-before="auto" style:column-width="14.086cm"/>
    </style:style>
    <style:style style:name="ro1" style:family="table-row">
      <style:table-row-properties style:row-height="0.452cm" fo:break-before="auto" style:use-optimal-row-height="true"/>
    </style:style>
    <style:style style:name="ro2" style:family="table-row">
      <style:table-row-properties style:row-height="4.791cm" fo:break-before="auto" style:use-optimal-row-height="true"/>
    </style:style>
    <style:style style:name="ro3" style:family="table-row">
      <style:table-row-properties style:row-height="1.755cm" fo:break-before="auto" style:use-optimal-row-height="false"/>
    </style:style>
    <style:style style:name="ro4" style:family="table-row">
      <style:table-row-properties style:row-height="1.222cm" fo:break-before="auto" style:use-optimal-row-height="false"/>
    </style:style>
    <style:style style:name="ro5" style:family="table-row">
      <style:table-row-properties style:row-height="1.462cm" fo:break-before="auto" style:use-optimal-row-height="false"/>
    </style:style>
    <style:style style:name="ro6" style:family="table-row">
      <style:table-row-properties style:row-height="1.834cm" fo:break-before="auto" style:use-optimal-row-height="false"/>
    </style:style>
    <style:style style:name="ro7" style:family="table-row">
      <style:table-row-properties style:row-height="0.478cm" fo:break-before="auto" style:use-optimal-row-height="false"/>
    </style:style>
    <style:style style:name="ro8" style:family="table-row">
      <style:table-row-properties style:row-height="2.027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4" style:family="table-cell" style:parent-style-name="Default">
      <style:table-cell-properties fo:wrap-option="wrap"/>
      <style:text-properties fo:color="#2a6099"/>
    </style:style>
    <style:style style:name="ce5" style:family="table-cell" style:parent-style-name="Default">
      <style:text-properties fo:color="#5983b0"/>
    </style:style>
    <style:style style:name="ce6" style:family="table-cell" style:parent-style-name="Default">
      <style:table-cell-properties fo:wrap-option="wrap"/>
      <style:text-properties fo:color="#ff0000"/>
    </style:style>
    <style:style style:name="ce2" style:family="table-cell" style:parent-style-name="Default">
      <style:text-properties fo:color="#5eb91e"/>
    </style:style>
    <style:style style:name="ce3" style:family="table-cell" style:parent-style-name="Default">
      <style:text-properties fo:color="#5eb91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fo:color="#5eb91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fo:color="#ea7500"/>
    </style:style>
    <style:style style:name="ce10" style:family="table-cell" style:parent-style-name="Default">
      <style:text-properties fo:color="#ea75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ff0000"/>
    </style:style>
    <style:style style:name="T3" style:family="text">
      <style:text-properties fo:color="#2a6099"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2a6099"/>
    </style:style>
  </office:automatic-styles>
  <office:body>
    <office:spreadsheet>
      <table:calculation-settings table:automatic-find-labels="false" table:use-regular-expressions="false" table:use-wildcards="true"/>
      <table:table table:name="fragen_judge_fileformat-03"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2"/>
        <table:table-column table:style-name="co6" table:default-cell-style-name="Default"/>
        <table:table-column table:style-name="co7" table:default-cell-style-name="ce2"/>
        <table:table-column table:style-name="co8" table:default-cell-style-name="Default"/>
        <table:table-column table:style-name="co9" table:default-cell-style-name="ce2"/>
        <table:table-column table:style-name="co6" table:default-cell-style-name="Default"/>
        <table:table-column table:style-name="co10" table:default-cell-style-name="ce2"/>
        <table:table-column table:style-name="co6" table:default-cell-style-name="Default"/>
        <table:table-column table:style-name="co11" table:default-cell-style-name="Default"/>
        <table:table-column table:style-name="co6" table:default-cell-style-name="Default"/>
        <table:table-row table:style-name="ro1">
          <table:table-cell office:value-type="string" calcext:value-type="string">
            <text:p><text:span text:style-name="T1">Kriterium</text:span>_deu</text:p>
          </table:table-cell>
          <table:table-cell office:value-type="string" calcext:value-type="string">
            <text:p><text:span text:style-name="T1">Erklärung_Kriterium</text:span>_deu</text:p>
          </table:table-cell>
          <table:table-cell table:style-name="Default" office:value-type="string" calcext:value-type="string">
            <text:p>Frage (deu)</text:p>
          </table:table-cell>
          <table:table-cell table:style-name="Default" office:value-type="string" calcext:value-type="string">
            <text:p>Erklärung_deu</text:p>
          </table:table-cell>
          <table:table-cell table:style-name="Default" office:value-type="string" calcext:value-type="string">
            <text:p>Antwort_1</text:p>
          </table:table-cell>
          <table:table-cell office:value-type="string" calcext:value-type="string">
            <text:p>Gewichtung_1</text:p>
          </table:table-cell>
          <table:table-cell table:style-name="Default" office:value-type="string" calcext:value-type="string">
            <text:p>Antwort_2</text:p>
          </table:table-cell>
          <table:table-cell office:value-type="string" calcext:value-type="string">
            <text:p>Gewichtung_2</text:p>
          </table:table-cell>
          <table:table-cell table:style-name="Default" office:value-type="string" calcext:value-type="string">
            <text:p>Antwort_3</text:p>
          </table:table-cell>
          <table:table-cell office:value-type="string" calcext:value-type="string">
            <text:p>Gewichtung_3</text:p>
          </table:table-cell>
          <table:table-cell table:style-name="Default" office:value-type="string" calcext:value-type="string">
            <text:p>Antwort_4</text:p>
          </table:table-cell>
          <table:table-cell office:value-type="string" calcext:value-type="string">
            <text:p>Gewichtung_4</text:p>
          </table:table-cell>
          <table:table-cell table:style-name="ce17" office:value-type="string" calcext:value-type="string">
            <text:p>Antwort_5</text:p>
          </table:table-cell>
          <table:table-cell table:style-name="ce17" office:value-type="string" calcext:value-type="string">
            <text:p>Gewichtung_5</text:p>
          </table:table-cell>
        </table:table-row>
        <table:table-row table:style-name="ro2">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able:table-cell>
          <table:table-cell office:value-type="string" calcext:value-type="string">
            <text:p>Ist das Dateiformat offen spezifiziert, d.h. das Recht die Spezifikation zu lesen, anzuwenden und basierend darauf Werkzeuge zu entwickeln, ist nicht eingeschränk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float" office:value="1" calcext:value-type="float">
            <text:p>1</text:p>
          </table:table-cell>
          <table:table-cell office:value-type="float" office:value="0" calcext:value-type="float">
            <text:p>0</text:p>
          </table:table-cell>
          <table:table-cell table:style-name="Default"/>
          <table:table-cell table:number-columns-repeated="3"/>
        </table:table-row>
        <table:table-row table:style-name="ro3">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Gibt es aktuell verfügbare und lauffähige Validierungswerkzeug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4">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Sind diese Validierungswerkzeuge Open Sourc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5">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Ist das Dateiformat durch eine internationale Standardisierungsorganisation geprüft und als Standard veröffentlich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6">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Ist die Spezifikation kostenfrei zugänglich?</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7">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Ist die Spezifikation komplett verfügbar?</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Wird das Dateiformat durch Behörden und öffentliche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Wird das Dateiformat auch außerhalb von Behörden und öffentlichen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Wird das Dateiformat aktiv betreu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office:value-type="string" calcext:value-type="string">
            <text:p>durch Community</text:p>
          </table:table-cell>
          <table:table-cell table:style-name="ce3" office:value-type="float" office:value="3" calcext:value-type="float">
            <text:p>3</text:p>
          </table:table-cell>
          <table:table-cell office:value-type="string" calcext:value-type="string">
            <text:p>durch einzelne, öffentliche Einrichtung</text:p>
          </table:table-cell>
          <table:table-cell table:style-name="ce3" office:value-type="float" office:value="2" calcext:value-type="float">
            <text:p>2</text:p>
          </table:table-cell>
          <table:table-cell office:value-type="string" calcext:value-type="string">
            <text:p>durch einzelne Person</text:p>
          </table:table-cell>
          <table:table-cell table:style-name="ce3" office:value-type="float" office:value="1" calcext:value-type="float">
            <text:p>1</text:p>
          </table:table-cell>
          <table:table-cell office:value-type="string" calcext:value-type="string">
            <text:p>Gar nicht</text:p>
          </table:table-cell>
          <table:table-cell table:style-name="ce3" office:value-type="float" office:value="0" calcext:value-type="float">
            <text:p>0</text:p>
          </table:table-cell>
          <table:table-cell table:number-columns-repeated="2"/>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Sind für das Dateiformat verschiedene Anzeigeprogramme verfügbar?</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Hat die Archiv- und Bibliothekscommunity dieses Dateiformat als archivfähiges Datenformat allgemein anerkann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das Dateiformat menschenlesbar und mittels Texteditor anzeig- und bearbeitbar?</text:p>
          </table:table-cell>
          <table:table-cell table:style-name="Default" office:value-type="string" calcext:value-type="string">
            <text:p>Handelt es sich um eine textbasiertes oder ein Binärformat?</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die verfügbare Spezifikation des Dateiformates detailliert genug, so dass man das Dateiformat mittels Hexeditor in Grundzügen analysieren kann?</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Verwendet das Dateiformat Standardzeichen oder andere bekannte Kodierungsmethoden, z. B. UTF-8 für Zeichen bzw. Zahlen nach IEEE?</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Software, die das Dateiformat erzeugen kann, für wenig Geld oder sogar kostenlos erhältlich?</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Software, die das Dateiformat erzeugen kann, für aktuelle Betriebssysteme verfügbar?</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das Dateiformat komprimiert bzw. benutzt es Datenkompressio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Erlaubt das Dateiformat benutzerdefinierte Datenkompression, die zu Veränderungen der essentiellen Charakteristiken, z. B. Kompressionsartefakte, der Datei führe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Grad der Selbstdokumentation</text:p>
          </table:table-cell>
          <table:table-cell office:value-type="string" calcext:value-type="string">
            <text:p>Ist das Dateiformat selbstdokumentiert?</text:p>
            <text:p/>
            <text:p>Je weniger dies der Fall ist, desto höher ist das Risiko, dass man ohne externe Metadaten eine Datei nicht zuordnen und analysieren kann.</text:p>
          </table:table-cell>
          <table:table-cell office:value-type="string" calcext:value-type="string">
            <text:p>Enthält das Format eine Selbstbeschreibung durch deskriptive Metadaten?</text:p>
          </table:table-cell>
          <table:table-cell table:style-name="ce4" office:value-type="string" calcext:value-type="string">
            <text:p> </text:p>
            <text:p>Deskriptive Metadaten beschreiben den Inhalt eines digitalen Objektes. Bei einem Textdokument wären dies z.B. Informationen zum Autor, eine Inhaltsbeschreibung und Schlagworte.</text:p>
            <text:p/>
            <text:p><text:span text:style-name="T3">(https://wiki.dnb.de/spaces/NESTOR/pages/95651769/Metadaten+Struktur)</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Enthält das Format eine Selbstbeschreibung durch technische Metadaten?</text:p>
          </table:table-cell>
          <table:table-cell office:value-type="string" calcext:value-type="string">
            <text:p><text:span text:style-name="T3">Technische Metadaten beinhalten unter anderem Angaben über das Dateiformat, über die Datenmenge und über die Software, mit der die Datei erstellt worden ist. </text:span></text:p>
            <text:p><text:span text:style-name="T3">(https://wiki.dnb.de/spaces/NESTOR/pages/95651769/Metadaten+Struktur)</text:span></text:p>
            <text:p/>
            <text:p><text:span text:style-name="T3">Ein Sonderfall ist das sog. Magic Byte, eine Art von Signatur, die sich meist am Dateianfang befindet, die Tools wie DROID</text:span> eine einfache Identifikation des Dateiformates erlaubt.<text:span text:style-name="T4"> </text:span><text:span text:style-name="T2">(zu prüfen – ist das MB ein techn. Md?)</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Enthält das Format eine Selbstbeschreibung durch administrative Metadaten?</text:p>
          </table:table-cell>
          <table:table-cell table:style-name="ce5" office:value-type="string" calcext:value-type="string">
            <text:p>Administrative Metadaten sind Angaben zum Dateinamen, Speicherort und zur Provenienz.</text:p>
            <text:p/>
            <text:p><text:span text:style-name="T3">(https://wiki.dnb.de/spaces/NESTOR/pages/95651769/Metadaten+Struktur)</text:spa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Liegen diese Metadaten in einem anerkannten, internationalen Metadatenstandard vor?</text:p>
          </table:table-cell>
          <table:table-cell table:style-name="ce6" office:value-type="string" calcext:value-type="string">
            <text:p>(Kontext und Beispiele geb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Sind die Formatmetadaten robust genug für ein akkurate Dateianalyse?</text:p>
          </table:table-cell>
          <table:table-cell table:style-name="ce6" office:value-type="string" calcext:value-type="string">
            <text:p>(Kontext und Beispiele geb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Erlaubt das Format den Nachweis der Authentizität durch eingebettete elektronische Signaturen, ohne die Nutzbarkeit einzuschränken?</text:p>
          </table:table-cell>
          <table:table-cell table:style-name="ce6" office:value-type="string" calcext:value-type="string">
            <text:p>(Kontext und Beispiele geb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eine ganz spezielle Hardwareumgebung (z. B. Grafikkarten, Soundkarten, Speicheranforderungen, Blu-Ray-Player, Spielekonsole), um damit zu interagieren, es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proprietäre Softwar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spezielle Plugins oder Script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ein bestimmtes Betriebssystem,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1" calcext:value-type="float">
            <text:p>1</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Lizenz- und Patentabhängigkeit</text:p>
          </table:table-cell>
          <table:table-cell office:value-type="string" calcext:value-type="string">
            <text:p><text:span text:style-name="T1">Ist das Dateiformat abhängig von Rechten Dritter?</text:span></text:p>
            <text:p/>
            <text:p>Je mehr dies der Fall ist, desto höher ist das Risiko, dass ein Dateiformat nicht mehr migrierbar ist, weil keine Konvertierungsprogramme entwickelt werden dürfen.</text:p>
          </table:table-cell>
          <table:table-cell office:value-type="string" calcext:value-type="string">
            <text:p>Ist das Format Gegenstand von Lizenz- oder Patentansprüchen, die die Entwicklung von Open-Source-Tools zum Öffnen und Verwalten der Dateien behindern könnt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Lizenz- und Patentabhängigkeit</text:p>
          </table:table-cell>
          <table:table-cell office:value-type="string" calcext:value-type="string">
            <text:p><text:span text:style-name="T1">Ist das Dateiformat abhängig von Rechten Dritter?</text:span></text:p>
            <text:p/>
            <text:p>Je mehr dies der Fall ist, desto höher ist das Risiko, dass ein Dateiformat nicht mehr migrierbar ist, weil keine Konvertierungsprogramme entwickelt werden dürfen.</text:p>
          </table:table-cell>
          <table:table-cell office:value-type="string" calcext:value-type="string">
            <text:p>Sind mit dem Format Gebühren verbunden, die sich aus den Lizenz- oder Patentansprüchen ergeb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Lizenz- und Patentabhängigkeit</text:p>
          </table:table-cell>
          <table:table-cell office:value-type="string" calcext:value-type="string">
            <text:p><text:span text:style-name="T1">Ist das Dateiformat abhängig von Rechten Dritter?</text:span></text:p>
            <text:p/>
            <text:p>Je mehr dies der Fall ist, desto höher ist das Risiko, dass ein Dateiformat nicht mehr migrierbar ist, weil keine Konvertierungsprogramme entwickelt werden dürfen.</text:p>
          </table:table-cell>
          <table:table-cell office:value-type="string" calcext:value-type="string">
            <text:p>Unterliegt die Formatspezifikation Open-Source-Lizenzbedingung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3" calcext:value-type="float">
            <text:p>3</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technischen Schutzmaßnahmen</text:p>
          </table:table-cell>
          <table:table-cell office:value-type="string" calcext:value-type="string">
            <text:p><text:span text:style-name="T1">Ermöglicht das Dateiformat technische Schutzmaßnahmen?</text:span></text:p>
            <text:p/>
            <text:p><text:span text:style-name="T1">Je mehr dies der Fall ist,</text:span> desto höher ist das Risiko, dass ein Dateiformat nicht mehr migrierbar ist, weil keine Konvertierungsprogramme entwickelt werden können.</text:p>
          </table:table-cell>
          <table:table-cell office:value-type="string" calcext:value-type="string">
            <text:p>Verfügt das Format über die Möglichkeit, die gesamte oder einen Teil der resultierenden Datei zu verschlüssel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technischen Schutzmaßnahmen</text:p>
          </table:table-cell>
          <table:table-cell office:value-type="string" calcext:value-type="string">
            <text:p><text:span text:style-name="T1">Ermöglicht das Dateiformat technische Schutzmaßnahmen?</text:span></text:p>
            <text:p/>
            <text:p><text:span text:style-name="T1">Je mehr dies der Fall ist,</text:span> desto höher ist das Risiko, dass ein Dateiformat nicht mehr migrierbar ist, weil keine Konvertierungsprogramme entwickelt werden können.</text:p>
          </table:table-cell>
          <table:table-cell office:value-type="string" calcext:value-type="string">
            <text:p>Erfordert das Format die Verwendung von Verschlüsselung?</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technischen Schutzmaßnahmen</text:p>
          </table:table-cell>
          <table:table-cell office:value-type="string" calcext:value-type="string">
            <text:p><text:span text:style-name="T1">Ermöglicht das Dateiformat technische Schutzmaßnahmen?</text:span></text:p>
            <text:p/>
            <text:p><text:span text:style-name="T1">Je mehr dies der Fall ist,</text:span> desto höher ist das Risiko, dass ein Dateiformat nicht mehr migrierbar ist, weil keine Konvertierungsprogramme entwickelt werden können.</text:p>
          </table:table-cell>
          <table:table-cell office:value-type="string" calcext:value-type="string">
            <text:p>Können technische Schutzmaßnahmen (z. B. Digital Rights Management) angewendet werde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technischen Schutzmaßnahmen</text:p>
          </table:table-cell>
          <table:table-cell office:value-type="string" calcext:value-type="string">
            <text:p><text:span text:style-name="T1">Ermöglicht das Dateiformat technische Schutzmaßnahmen?</text:span></text:p>
            <text:p/>
            <text:p><text:span text:style-name="T1">Je mehr dies der Fall ist,</text:span> desto höher ist das Risiko, dass ein Dateiformat nicht mehr migrierbar ist, weil keine Konvertierungsprogramme entwickelt werden können.</text:p>
          </table:table-cell>
          <table:table-cell office:value-type="string" calcext:value-type="string">
            <text:p>Erlaubt das Format eingebettete Informationen zur Durchsetzbarkeit von Rechtsansprüchen, die die zukünftige Nutzbarkeit gefährden könnten, wie z. B. Wasserzeichen, zeitlich befristete Lizenzschlüssel?</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table-cell table:style-name="ce8"/>
          <table:table-cell table:number-columns-repeated="2"/>
        </table:table-row>
        <table:table-row table:style-name="ro12">
          <table:table-cell office:value-type="string" calcext:value-type="string">
            <text:p>Grad der Alterung</text:p>
          </table:table-cell>
          <table:table-cell office:value-type="string" calcext:value-type="string">
            <text:p>Wie veraltet oder wie instabil<text:span text:style-name="T2"> (unerprobt,dynamisch entwickelt?)</text:span> ist das Dateiformat?</text:p>
            <text:p/>
            <text:p>Die Fragen dienen als Indiz für mögliche Formatobsoleszenz als auch für die Stabilität von Dateiformaten. </text:p>
            <text:p/>
            <text:p>Sie helfen, das Risiko zu bewerten, dass eine Datei nicht gelesen werden kann, weil die Dateiformatspezifikation veraltet oder zu frisch ist. <text:span text:style-name="T2">Das geringste Risiko besteht hier für Dateiformate, deren Spezifikation vor längerer Zeit erstmals veröffentlicht wurde und die seitdem aktualisiert wurde.</text:span></text:p>
          </table:table-cell>
          <table:table-cell office:value-type="string" calcext:value-type="string">
            <text:p>Wann wurde die Formatspezifikation erstmals erstell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1" calcext:value-type="float">
            <text:p>1</text:p>
          </table:table-cell>
          <table:table-cell table:number-columns-repeated="2"/>
        </table:table-row>
        <table:table-row table:style-name="ro12">
          <table:table-cell office:value-type="string" calcext:value-type="string">
            <text:p>Grad der Alterung</text:p>
          </table:table-cell>
          <table:table-cell office:value-type="string" calcext:value-type="string">
            <text:p>Wie veraltet oder wie instabil<text:span text:style-name="T2"> (unerprobt,dynamisch entwickelt?)</text:span> ist das Dateiformat?</text:p>
            <text:p/>
            <text:p>Die Fragen dienen als Indiz für mögliche Formatobsoleszenz als auch für die Stabilität von Dateiformaten. </text:p>
            <text:p/>
            <text:p>Sie helfen, das Risiko zu bewerten, dass eine Datei nicht gelesen werden kann, weil die Dateiformatspezifikation veraltet oder zu frisch ist. <text:span text:style-name="T2">Das geringste Risiko besteht hier für Dateiformate, deren Spezifikation vor längerer Zeit erstmals veröffentlicht wurde und die seitdem aktualisiert wurde.</text:span></text:p>
          </table:table-cell>
          <table:table-cell office:value-type="string" calcext:value-type="string">
            <text:p>Wann wurde die Formatspezifikation letztmalig aktualisier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3" calcext:value-type="float">
            <text:p>3</text:p>
          </table:table-cell>
          <table:table-cell table:number-columns-repeated="2"/>
        </table:table-row>
        <table:table-row table:style-name="ro12">
          <table:table-cell office:value-type="string" calcext:value-type="string">
            <text:p>Grad der Alterung</text:p>
          </table:table-cell>
          <table:table-cell office:value-type="string" calcext:value-type="string">
            <text:p>Wie veraltet oder wie instabil<text:span text:style-name="T2"> (unerprobt,dynamisch entwickelt?)</text:span> ist das Dateiformat?</text:p>
            <text:p/>
            <text:p>Die Fragen dienen als Indiz für mögliche Formatobsoleszenz als auch für die Stabilität von Dateiformaten. </text:p>
            <text:p/>
            <text:p>Sie helfen, das Risiko zu bewerten, dass eine Datei nicht gelesen werden kann, weil die Dateiformatspezifikation veraltet oder zu frisch ist. <text:span text:style-name="T2">Das geringste Risiko besteht hier für Dateiformate, deren Spezifikation vor längerer Zeit erstmals veröffentlicht wurde und die seitdem aktualisiert wurde.</text:span></text:p>
          </table:table-cell>
          <table:table-cell office:value-type="string" calcext:value-type="string">
            <text:p>Ist die Formatspezifikation unter einem üblichen persistenten Identifier bzw. persistenter URL auffindbar?</text:p>
          </table:table-cell>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2">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Verweist die Spezifikation explizit auf andere Dateiformat-Standard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Erlaubt die Spezifikation Varianten des Dateiformat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Besteht die Spezifikation aus mehreren Teilspezifikationen, die für sich veröffentlicht wurden und nicht alle aufeinander verweis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Verwendet das Datenformat für Daten und Metadaten ein eingeschränktes, kontrolliertes Vokabular?</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Ist die Formatspezifikation umfangreich?</text:p>
          </table:table-cell>
          <table:table-cell office:value-type="string" calcext:value-type="string">
            <text:p>Die geringe Komplexität eines Dateiformates geht oft mit einer besseren Verständlichkeit und einer weniger fehleranfälligen Implementierung einher.</text:p>
          </table:table-cell>
          <table:table-cell office:value-type="string" calcext:value-type="string">
            <text:p>weniger als 100 Seiten</text:p>
          </table:table-cell>
          <table:table-cell table:style-name="ce2" office:value-type="float" office:value="3" calcext:value-type="float">
            <text:p>3</text:p>
          </table:table-cell>
          <table:table-cell office:value-type="string" calcext:value-type="string">
            <text:p>weniger als 1000 Seiten</text:p>
          </table:table-cell>
          <table:table-cell table:style-name="ce3" office:value-type="float" office:value="2" calcext:value-type="float">
            <text:p>2</text:p>
          </table:table-cell>
          <table:table-cell office:value-type="string" calcext:value-type="string">
            <text:p>weniger als 5000 Seiten</text:p>
          </table:table-cell>
          <table:table-cell table:style-name="ce3" office:value-type="float" office:value="1" calcext:value-type="float">
            <text:p>1</text:p>
          </table:table-cell>
          <table:table-cell office:value-type="string" calcext:value-type="string">
            <text:p>mehr als 5000 Seiten</text:p>
          </table:table-cell>
          <table:table-cell table:style-name="ce9" office:value-type="float" office:value="0" calcext:value-type="float">
            <text:p>0</text:p>
          </table:table-cell>
          <table:table-cell table:number-columns-repeated="2"/>
        </table:table-row>
        <table:table-row table:style-name="ro12">
          <table:table-cell office:value-type="string" calcext:value-type="string">
            <text:p>Komplexitätsgrad</text:p>
          </table:table-cell>
          <table:table-cell office:value-type="string" calcext:value-type="string">
            <text:p>Wie einfach ist das Dateiformat?</text:p>
            <text:p/>
            <text:p>Die Fragen helfen zu evaluiere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Erlaubt die Spezifikation mehrere Kodierungsvarianten von Dat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Ist das Datenformat multiplex-fähig, sprich: Mit anderen Datenformaten im Bitstrom mischbar, z. B. weil es Datenpaket-orientiert aufgebaut ist (wie z. B. MP3)?</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Ist das Dateiformat menschenlesbar und mittels Texteditor anzeig- und bearbeit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Ist das Dateiformat XML-bas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Verwendet das Dateiformat einen eingeschränkten Bytewerte-Bereich für die Date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Verwendet das Dateiformat in Voreinstellung Kompressio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Verwendet das Dateiformat als zentralen Einstiegspunkt den Dateianfang, das Dateiende oder ist es Datenblock-orient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Dateianfang</text:p>
          </table:table-cell>
          <table:table-cell table:style-name="ce3" office:value-type="float" office:value="2" calcext:value-type="float">
            <text:p>2</text:p>
          </table:table-cell>
          <table:table-cell office:value-type="string" calcext:value-type="string">
            <text:p>Dateiende</text:p>
          </table:table-cell>
          <table:table-cell table:style-name="ce3" office:value-type="float" office:value="3" calcext:value-type="float">
            <text:p>3</text:p>
          </table:table-cell>
          <table:table-cell office:value-type="string" calcext:value-type="string">
            <text:p>Datenblock</text:p>
          </table:table-cell>
          <table:table-cell table:style-name="ce3" office:value-type="float" office:value="0" calcext:value-type="float">
            <text:p>0</text:p>
          </table:table-cell>
          <table:table-cell office:value-type="string" calcext:value-type="string">
            <text:p>unbekannt</text:p>
          </table:table-cell>
          <table:table-cell table:style-name="ce9" office:value-type="float" office:value="0" calcext:value-type="float">
            <text:p>0</text:p>
          </table:table-cell>
          <table:table-cell table:number-columns-repeated="2"/>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die Headerinformationen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alle Daten außerhalb des Headers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Ja, alle</text:p>
          </table:table-cell>
          <table:table-cell table:style-name="ce3" office:value-type="float" office:value="2" calcext:value-type="float">
            <text:p>2</text:p>
          </table:table-cell>
          <table:table-cell office:value-type="string" calcext:value-type="string">
            <text:p>Ja, nur Metadaten</text:p>
          </table:table-cell>
          <table:table-cell table:style-name="ce3" office:value-type="float" office:value="1" calcext:value-type="float">
            <text:p>1</text:p>
          </table:table-cell>
          <table:table-cell office:value-type="string" calcext:value-type="string">
            <text:p>Ja, nur Nutzdaten</text:p>
          </table:table-cell>
          <table:table-cell table:style-name="ce3" office:value-type="float" office:value="2" calcext:value-type="float">
            <text:p>2</text:p>
          </table:table-cell>
          <table:table-cell office:value-type="string" calcext:value-type="string">
            <text:p>Nein</text:p>
          </table:table-cell>
          <table:table-cell table:style-name="ce9" office:value-type="float" office:value="0" calcext:value-type="float">
            <text:p>0</text:p>
          </table:table-cell>
          <table:table-cell table:style-name="ce10" office:value-type="string" calcext:value-type="string">
            <text:p>Sonstige</text:p>
          </table:table-cell>
          <table:table-cell table:style-name="ce9" office:value-type="float" office:value="0" calcext:value-type="float">
            <text:p>0</text:p>
          </table:table-cell>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1-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1-Bitfehler korrigierbar (z. B. bei CRC32)?</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text:span text:style-name="T1">Wie robust ist das Dateiformat?</text:span></text:p>
            <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n-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 table:number-rows-repeated="1048519">
          <table:table-cell table:number-columns-repeated="14"/>
        </table:table-row>
        <table:table-row table:style-name="ro1">
          <table:table-cell table:number-columns-repeated="14"/>
        </table:table-row>
      </table:table>
      <table:table table:name="fragen_original" table:style-name="ta1">
        <table:table-column table:style-name="co13" table:default-cell-style-name="Default"/>
        <table:table-column table:style-name="co14" table:default-cell-style-name="ce1"/>
        <table:table-column table:style-name="co15" table:default-cell-style-name="ce1"/>
        <table:table-column table:style-name="co4" table:default-cell-style-name="ce1"/>
        <table:table-column table:style-name="co5" table:default-cell-style-name="ce2"/>
        <table:table-column table:style-name="co6" table:default-cell-style-name="Default"/>
        <table:table-column table:style-name="co7" table:default-cell-style-name="ce2"/>
        <table:table-column table:style-name="co8" table:default-cell-style-name="Default"/>
        <table:table-column table:style-name="co9" table:default-cell-style-name="ce2"/>
        <table:table-column table:style-name="co6" table:default-cell-style-name="Default"/>
        <table:table-column table:style-name="co10" table:default-cell-style-name="ce2"/>
        <table:table-column table:style-name="co6" table:default-cell-style-name="Default"/>
        <table:table-column table:style-name="co11" table:default-cell-style-name="Default"/>
        <table:table-column table:style-name="co6" table:default-cell-style-name="Default"/>
        <table:table-row table:style-name="ro1">
          <table:table-cell office:value-type="string" calcext:value-type="string">
            <text:p><text:span text:style-name="T1">Kriterium</text:span>_deu</text:p>
          </table:table-cell>
          <table:table-cell office:value-type="string" calcext:value-type="string">
            <text:p><text:span text:style-name="T1">Erklärung_Kriterium</text:span>_deu</text:p>
          </table:table-cell>
          <table:table-cell table:style-name="Default" office:value-type="string" calcext:value-type="string">
            <text:p>Frage (deu)</text:p>
          </table:table-cell>
          <table:table-cell table:style-name="Default" office:value-type="string" calcext:value-type="string">
            <text:p>Erklärung_deu</text:p>
          </table:table-cell>
          <table:table-cell table:style-name="Default" office:value-type="string" calcext:value-type="string">
            <text:p>Antwort_1</text:p>
          </table:table-cell>
          <table:table-cell office:value-type="string" calcext:value-type="string">
            <text:p>Gewichtung_1</text:p>
          </table:table-cell>
          <table:table-cell table:style-name="Default" office:value-type="string" calcext:value-type="string">
            <text:p>Antwort_2</text:p>
          </table:table-cell>
          <table:table-cell office:value-type="string" calcext:value-type="string">
            <text:p>Gewichtung_2</text:p>
          </table:table-cell>
          <table:table-cell table:style-name="Default" office:value-type="string" calcext:value-type="string">
            <text:p>Antwort_3</text:p>
          </table:table-cell>
          <table:table-cell office:value-type="string" calcext:value-type="string">
            <text:p>Gewichtung_3</text:p>
          </table:table-cell>
          <table:table-cell table:style-name="Default" office:value-type="string" calcext:value-type="string">
            <text:p>Antwort_4</text:p>
          </table:table-cell>
          <table:table-cell office:value-type="string" calcext:value-type="string">
            <text:p>Gewichtung_4</text:p>
          </table:table-cell>
          <table:table-cell table:style-name="ce17" office:value-type="string" calcext:value-type="string">
            <text:p>Antwort_5</text:p>
          </table:table-cell>
          <table:table-cell table:style-name="ce17" office:value-type="string" calcext:value-type="string">
            <text:p>Gewichtung_5</text:p>
          </table:table-cell>
        </table:table-row>
        <table:table-row table:style-name="ro2">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as Dateiformat offen spezifiziert, d.h. das Recht die Spezifikation zu lesen, anzuwenden und basierend darauf Werkzeuge zu entwickeln, ist nicht eingeschränk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style-name="Default"/>
          <table:table-cell table:number-columns-repeated="3"/>
        </table:table-row>
        <table:table-row table:style-name="ro3">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Gibt es aktuell verfügbare und lauffähige Validierungswerkzeug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4">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Sind diese Validierungswerkzeuge Open Sourc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5">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as Dateiformat durch eine internationale Standardisierungsorganisation geprüft und als Standard veröffentlich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6">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ie Spezifikation kostenfrei zugänglich?</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7">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ie Spezifikation komplett verfügbar?</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3">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durch Behörden und öffentliche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auch außerhalb von Behörden und öffentlichen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aktiv betreu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office:value-type="string" calcext:value-type="string">
            <text:p>durch Community</text:p>
          </table:table-cell>
          <table:table-cell table:style-name="ce3" office:value-type="float" office:value="3" calcext:value-type="float">
            <text:p>3</text:p>
          </table:table-cell>
          <table:table-cell office:value-type="string" calcext:value-type="string">
            <text:p>durch einzelne, öffentliche Einrichtung</text:p>
          </table:table-cell>
          <table:table-cell table:style-name="ce3" office:value-type="float" office:value="2" calcext:value-type="float">
            <text:p>2</text:p>
          </table:table-cell>
          <table:table-cell office:value-type="string" calcext:value-type="string">
            <text:p>durch einzelne Person</text:p>
          </table:table-cell>
          <table:table-cell table:style-name="ce3" office:value-type="float" office:value="1" calcext:value-type="float">
            <text:p>1</text:p>
          </table:table-cell>
          <table:table-cell office:value-type="string" calcext:value-type="string">
            <text:p>Gar nicht</text:p>
          </table:table-cell>
          <table:table-cell table:style-name="ce3" office:value-type="float" office:value="0" calcext:value-type="float">
            <text:p>0</text:p>
          </table:table-cell>
          <table:table-cell table:number-columns-repeated="2"/>
        </table:table-row>
        <table:table-row table:style-name="ro13">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Sind für das Dateiformat verschiedene Anzeigeprogramme verfügbar?</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Hat die Archiv- und Bibliothekscommunity dieses Dateiformat als archivfähiges Datenformat allgemein anerkann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4">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as Dateiformat menschenlesbar und mittels Texteditor anzeig- und bearbeitbar?</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4">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ie verfügbare Spezifikation des Dateiformates detailliert genug, so dass man das Dateiformat mittels Hexeditor in Grundzügen analysieren kann?</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4">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Verwendet das Dateiformat Standardzeichen oder andere bekannte Kodierungsmethoden, z. B. UTF8 für Zeichen bzw. Zahlen nach IEEE?</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4">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Software, die das Dateiformat erzeugen kann, für wenig Geld oder gar kostenlos erhältlich?</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4">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Software, die das Dateiformat erzeugen kann, für aktuelle Computerplattformen verfügbar?</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4">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as Dateiformat komprimiert bzw. benutzt es Datenkompressio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4">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Erlaubt das Dateiformat nutzerdefinierte Datenkompression, die zu Veränderungen der essentiellen Charakteristiken, z. B. Kompressionsartefakte, der Datei führe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deskriptive Metadat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4"> </text:span></text:p>
            <text:p/>
            <text:p><text:span text:style-name="T2">(‼️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technische Metadat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4"> </text:span></text:p>
            <text:p/>
            <text:p><text:span text:style-name="T2">(‼️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administrative Metadat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4"> </text:span></text:p>
            <text:p/>
            <text:p><text:span text:style-name="T2">(‼️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Liegen diese Metadaten in einem anerkannten, internationalen Metadatenstandard vor?</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4"> </text:span></text:p>
            <text:p/>
            <text:p><text:span text:style-name="T2">(‼️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Sind die Formatmetadaten robust genug für ein akkurate Dateianalyse?</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4"> </text:span></text:p>
            <text:p/>
            <text:p><text:span text:style-name="T2">(‼️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rlaubt das Format den Nachweis der Authentizität durch eingebettete elektronische Signaturen, ohne die Nutzbarkeit einzuschränk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4"> </text:span></text:p>
            <text:p/>
            <text:p><text:span text:style-name="T2">(‼️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eine ganz spezielle Hardwareumgebung (z. B. Grafikkarten, Soundkarten, Speicheranforderungen, Blu-Ray-Player, Spielekonsole), um damit zu interagieren, es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proprietäre Softwar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spezielle Plugins oder Script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ein bestimmtes Betriebssystem,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1" calcext:value-type="float">
            <text:p>1</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Ist das Format Gegenstand von Lizenz- oder Patentansprüchen, die die Entwicklung von Open-Source-Tools zum Öffnen und Verwalten der Dateien behindern könnt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Sind mit dem Format Gebühren verbunden, die sich aus den Lizenz- oder Patentansprüchen ergeb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Unterliegt die Formatspezifikation Open-Source-Lizenzbedingung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3" calcext:value-type="float">
            <text:p>3</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Verfügt das Format über die Möglichkeit, die gesamte oder einen Teil der resultierenden Datei zu verschlüssel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Erfordert das Format die Verwendung von Verschlüsselung?</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Können technische Schutzmaßnahmen (z. B. Digital Rights Management) angewendet werde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Erlaubt das Format eingebettete Informationen zur Durchsetzbarkeit von Rechtsansprüchen, die die zukünftige Nutzbarkeit gefährden könnten, wie z. B. Wasserzeichen, zeitlich befristete Lizenzschlüssel?</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table-cell table:style-name="ce8"/>
          <table:table-cell table:number-columns-repeated="2"/>
        </table:table-row>
        <table:table-row table:style-name="ro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Wann wurde die Formatspezifikation erstmals erstell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1" calcext:value-type="float">
            <text:p>1</text:p>
          </table:table-cell>
          <table:table-cell table:number-columns-repeated="2"/>
        </table:table-row>
        <table:table-row table:style-name="ro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Wann wurde die Formatspezifikation letztmalig aktualisier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3" calcext:value-type="float">
            <text:p>3</text:p>
          </table:table-cell>
          <table:table-cell table:number-columns-repeated="2"/>
        </table:table-row>
        <table:table-row table:style-name="ro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Ist die Formatspezifikation unter einem üblichen persistenten Identifier bzw. persistenter URL auffindbar?</text:p>
          </table:table-cell>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Verweist die Spezifikation explizit auf andere Dateiformat-Standard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Erlaubt die Spezifikation Varianten des Dateiformat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Besteht die Spezifikation aus mehreren Teilspezifikationen, die für sich veröffentlicht wurden und nicht alle aufeinander verweis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Verwendet das Datenformat für Daten und Metadaten ein eingeschränktes, kontrolliertes Vokabular?</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Ist die Formatspezifikation umfangreich??</text:p>
          </table:table-cell>
          <table:table-cell office:value-type="string" calcext:value-type="string">
            <text:p>Die geringe Komplexität eines Dateiformates geht oft mit einer besseren Verständlichkeit und einer weniger fehleranfälligen Implementierung einher.</text:p>
          </table:table-cell>
          <table:table-cell office:value-type="string" calcext:value-type="string">
            <text:p>weniger als 100 Seiten</text:p>
          </table:table-cell>
          <table:table-cell table:style-name="ce2" office:value-type="float" office:value="3" calcext:value-type="float">
            <text:p>3</text:p>
          </table:table-cell>
          <table:table-cell office:value-type="string" calcext:value-type="string">
            <text:p>weniger als 1000 Seiten</text:p>
          </table:table-cell>
          <table:table-cell table:style-name="ce3" office:value-type="float" office:value="2" calcext:value-type="float">
            <text:p>2</text:p>
          </table:table-cell>
          <table:table-cell office:value-type="string" calcext:value-type="string">
            <text:p>weniger als 5000 Seiten</text:p>
          </table:table-cell>
          <table:table-cell table:style-name="ce3" office:value-type="float" office:value="1" calcext:value-type="float">
            <text:p>1</text:p>
          </table:table-cell>
          <table:table-cell office:value-type="string" calcext:value-type="string">
            <text:p>mehr als 5000 Seiten</text:p>
          </table:table-cell>
          <table:table-cell table:style-name="ce9" office:value-type="float" office:value="0" calcext:value-type="float">
            <text:p>0</text:p>
          </table:table-cell>
          <table:table-cell table:number-columns-repeated="2"/>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Erlaubt die Spezifikation mehrere Kodierungsvarianten von Dat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Ist das Datenformat multiplex-fähig, sprich: Mit anderen Datenformaten im Bitstrom mischbar, z. B. weil es Datenpaket-orientiert aufgebaut ist (wie z. B. MP3)?</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Ist das Dateiformat menschenlesbar und mittels Texteditor anzeig- und bearbeit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Ist das Dateiformat XML-bas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einen eingeschränkten Bytewerte-Bereich für die Date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in Voreinstellung Kompressio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als zentralen Einstiegspunkt den Dateianfang, das Dateiende oder ist es Datenblock-orient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Dateianfang</text:p>
          </table:table-cell>
          <table:table-cell table:style-name="ce3" office:value-type="float" office:value="2" calcext:value-type="float">
            <text:p>2</text:p>
          </table:table-cell>
          <table:table-cell office:value-type="string" calcext:value-type="string">
            <text:p>Dateiende</text:p>
          </table:table-cell>
          <table:table-cell table:style-name="ce3" office:value-type="float" office:value="3" calcext:value-type="float">
            <text:p>3</text:p>
          </table:table-cell>
          <table:table-cell office:value-type="string" calcext:value-type="string">
            <text:p>Datenblock</text:p>
          </table:table-cell>
          <table:table-cell table:style-name="ce3" office:value-type="float" office:value="0" calcext:value-type="float">
            <text:p>0</text:p>
          </table:table-cell>
          <table:table-cell office:value-type="string" calcext:value-type="string">
            <text:p>unbekannt</text:p>
          </table:table-cell>
          <table:table-cell table:style-name="ce9" office:value-type="float" office:value="0" calcext:value-type="float">
            <text:p>0</text:p>
          </table:table-cell>
          <table:table-cell table:number-columns-repeated="2"/>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die Headerinformationen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alle Daten außerhalb des Headers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Ja, alle</text:p>
          </table:table-cell>
          <table:table-cell table:style-name="ce3" office:value-type="float" office:value="2" calcext:value-type="float">
            <text:p>2</text:p>
          </table:table-cell>
          <table:table-cell office:value-type="string" calcext:value-type="string">
            <text:p>Ja, nur Metadaten</text:p>
          </table:table-cell>
          <table:table-cell table:style-name="ce3" office:value-type="float" office:value="1" calcext:value-type="float">
            <text:p>1</text:p>
          </table:table-cell>
          <table:table-cell office:value-type="string" calcext:value-type="string">
            <text:p>Ja, nur Nutzdaten</text:p>
          </table:table-cell>
          <table:table-cell table:style-name="ce3" office:value-type="float" office:value="2" calcext:value-type="float">
            <text:p>2</text:p>
          </table:table-cell>
          <table:table-cell office:value-type="string" calcext:value-type="string">
            <text:p>Nein</text:p>
          </table:table-cell>
          <table:table-cell table:style-name="ce9" office:value-type="float" office:value="0" calcext:value-type="float">
            <text:p>0</text:p>
          </table:table-cell>
          <table:table-cell table:style-name="ce17" office:value-type="string" calcext:value-type="string">
            <text:p>Sonstige</text:p>
          </table:table-cell>
          <table:table-cell table:style-name="ce9" office:value-type="float" office:value="0" calcext:value-type="float">
            <text:p>0</text:p>
          </table:table-cell>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1-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1-Bitfehler korrigierbar (z. B. bei CRC32)?</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n-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 table:number-rows-repeated="1048519">
          <table:table-cell table:number-columns-repeated="14"/>
        </table:table-row>
        <table:table-row table:style-name="ro1">
          <table:table-cell table:number-columns-repeated="14"/>
        </table:table-row>
      </table:table>
      <table:named-expressions/>
      <table:database-ranges>
        <table:database-range table:name="__Anonymous_Sheet_DB__0" table:target-range-address="'fragen_judge_fileformat-03'.A1:'fragen_judge_fileformat-03'.N56" table:display-filter-buttons="true"/>
        <table:database-range table:name="__Anonymous_Sheet_DB__1" table:target-range-address="fragen_original.A1:fragen_original.N5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ans" svg:font-family="'Ubuntu Sans'"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9P0" style:volatile="true">
      <number:currency-symbol number:language="de" number:country="AT">€</number:currency-symbol>
      <number:text> </number:text>
      <number:number number:decimal-places="2" number:min-decimal-places="2" number:min-integer-digits="1" number:grouping="true"/>
    </number:currency-style>
    <number:currency-style style:name="N119">
      <style:text-properties fo:color="#ff0000"/>
      <number:text>-</number:text>
      <number:currency-symbol number:language="de" number:country="AT">€</number:currency-symbol>
      <number:text> </number:text>
      <number:number number:decimal-places="2" number:min-decimal-places="2" number:min-integer-digits="1" number:grouping="true"/>
      <style:map style:condition="value()&gt;=0" style:apply-style-name="N119P0"/>
    </number:currency-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20">00/00/0000</text:date>, <text:time style:data-style-name="N2" text:time-value="09:29:24.9489832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20T11:07:55.617419118</dc:date>
    <meta:editing-duration>PT5H29M35S</meta:editing-duration>
    <meta:editing-cycles>37</meta:editing-cycles>
    <meta:generator>LibreOffice/26.2.4.2$Linux_X86_64 LibreOffice_project/620$Build-2</meta:generator>
    <meta:document-statistic meta:table-count="2" meta:cell-count="1129" meta:object-count="0"/>
  </office:meta>
</office:document-meta>
</file>