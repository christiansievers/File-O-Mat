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ans" svg:font-family="'Ubuntu Sans'" style:font-pitch="variable"/>
  </office:font-face-decls>
  <office:automatic-styles>
    <style:style style:name="co1" style:family="table-column">
      <style:table-column-properties fo:break-before="auto" style:column-width="4.584cm"/>
    </style:style>
    <style:style style:name="co2" style:family="table-column">
      <style:table-column-properties fo:break-before="auto" style:column-width="10.283cm"/>
    </style:style>
    <style:style style:name="co3" style:family="table-column">
      <style:table-column-properties fo:break-before="auto" style:column-width="9.126cm"/>
    </style:style>
    <style:style style:name="co4" style:family="table-column">
      <style:table-column-properties fo:break-before="auto" style:column-width="14.995cm"/>
    </style:style>
    <style:style style:name="co5" style:family="table-column">
      <style:table-column-properties fo:break-before="auto" style:column-width="4.353cm"/>
    </style:style>
    <style:style style:name="co6" style:family="table-column">
      <style:table-column-properties fo:break-before="auto" style:column-width="2.482cm"/>
    </style:style>
    <style:style style:name="co7" style:family="table-column">
      <style:table-column-properties fo:break-before="auto" style:column-width="6.108cm"/>
    </style:style>
    <style:style style:name="co8" style:family="table-column">
      <style:table-column-properties fo:break-before="auto" style:column-width="3cm"/>
    </style:style>
    <style:style style:name="co9" style:family="table-column">
      <style:table-column-properties fo:break-before="auto" style:column-width="4.071cm"/>
    </style:style>
    <style:style style:name="co10" style:family="table-column">
      <style:table-column-properties fo:break-before="auto" style:column-width="4.408cm"/>
    </style:style>
    <style:style style:name="co11" style:family="table-column">
      <style:table-column-properties fo:break-before="auto" style:column-width="2.118cm"/>
    </style:style>
    <style:style style:name="co12" style:family="table-column">
      <style:table-column-properties fo:break-before="auto" style:column-width="2.258cm"/>
    </style:style>
    <style:style style:name="co13" style:family="table-column">
      <style:table-column-properties fo:break-before="auto" style:column-width="4.787cm"/>
    </style:style>
    <style:style style:name="co14" style:family="table-column">
      <style:table-column-properties fo:break-before="auto" style:column-width="11.363cm"/>
    </style:style>
    <style:style style:name="co15" style:family="table-column">
      <style:table-column-properties fo:break-before="auto" style:column-width="14.085cm"/>
    </style:style>
    <style:style style:name="ro1" style:family="table-row">
      <style:table-row-properties style:row-height="0.452cm" fo:break-before="auto" style:use-optimal-row-height="true"/>
    </style:style>
    <style:style style:name="ro2" style:family="table-row">
      <style:table-row-properties style:row-height="6.369cm" fo:break-before="auto" style:use-optimal-row-height="true"/>
    </style:style>
    <style:style style:name="ro3" style:family="table-row">
      <style:table-row-properties style:row-height="1.755cm" fo:break-before="auto" style:use-optimal-row-height="false"/>
    </style:style>
    <style:style style:name="ro4" style:family="table-row">
      <style:table-row-properties style:row-height="1.222cm" fo:break-before="auto" style:use-optimal-row-height="false"/>
    </style:style>
    <style:style style:name="ro5" style:family="table-row">
      <style:table-row-properties style:row-height="1.462cm" fo:break-before="auto" style:use-optimal-row-height="false"/>
    </style:style>
    <style:style style:name="ro6" style:family="table-row">
      <style:table-row-properties style:row-height="1.834cm" fo:break-before="auto" style:use-optimal-row-height="false"/>
    </style:style>
    <style:style style:name="ro7" style:family="table-row">
      <style:table-row-properties style:row-height="0.478cm" fo:break-before="auto" style:use-optimal-row-height="false"/>
    </style:style>
    <style:style style:name="ro8" style:family="table-row">
      <style:table-row-properties style:row-height="2.027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4.396cm" fo:break-before="auto" style:use-optimal-row-height="true"/>
    </style:style>
    <style:style style:name="ro14" style:family="table-row">
      <style:table-row-properties style:row-height="4.791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1.236cm" fo:break-before="auto" style:use-optimal-row-height="true"/>
    </style:style>
    <style:style style:name="ta1" style:family="table" style:master-page-name="PageStyle_5f_fragen_5f_judge_5f_fileformat-03">
      <style:table-properties table:display="true" style:writing-mode="lr-tb"/>
    </style:style>
    <style:style style:name="ta2" style:family="table" style:master-page-name="PageStyle_5f_fragen_5f_original">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a609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5983b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5eb9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ea75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2a6099"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use-window-font-color="true"/>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2a6099"/>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ff0000"/>
    </style:style>
    <style:style style:name="T6" style:family="text">
      <style:text-properties fo:color="#5983b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7" style:family="text">
      <style:text-properties fo:color="#ff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null-year="1950"/>
      <table:table table:name="fragen_judge_fileformat-03"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8"/>
        <table:table-column table:style-name="co6" table:default-cell-style-name="ce4"/>
        <table:table-column table:style-name="co7" table:default-cell-style-name="ce8"/>
        <table:table-column table:style-name="co8" table:default-cell-style-name="ce4"/>
        <table:table-column table:style-name="co9" table:default-cell-style-name="ce8"/>
        <table:table-column table:style-name="co6" table:default-cell-style-name="ce4"/>
        <table:table-column table:style-name="co10" table:default-cell-style-name="ce8"/>
        <table:table-column table:style-name="co6" table:default-cell-style-name="ce4"/>
        <table:table-column table:style-name="co11" table:default-cell-style-name="ce4"/>
        <table:table-column table:style-name="co6" table:default-cell-style-name="ce4"/>
        <table:table-column table:style-name="co12" table:number-columns-repeated="16370"/>
        <table:table-row table:style-name="ro1">
          <table:table-cell table:style-name="ce1" office:value-type="string" calcext:value-type="string">
            <text:p>Kriterium_deu</text:p>
          </table:table-cell>
          <table:table-cell table:style-name="ce1" office:value-type="string" calcext:value-type="string">
            <text:p>Erklärung_Kriterium_deu</text:p>
          </table:table-cell>
          <table:table-cell table:style-name="ce2" office:value-type="string" calcext:value-type="string">
            <text:p>Frage (deu)</text:p>
          </table:table-cell>
          <table:table-cell table:style-name="ce2" office:value-type="string" calcext:value-type="string">
            <text:p>Erklärung_deu</text:p>
          </table:table-cell>
          <table:table-cell table:style-name="ce2" office:value-type="string" calcext:value-type="string">
            <text:p>Antwort_1</text:p>
          </table:table-cell>
          <table:table-cell table:style-name="ce2" office:value-type="string" calcext:value-type="string">
            <text:p>Gewichtung_1</text:p>
          </table:table-cell>
          <table:table-cell table:style-name="ce2" office:value-type="string" calcext:value-type="string">
            <text:p>Antwort_2</text:p>
          </table:table-cell>
          <table:table-cell table:style-name="ce2" office:value-type="string" calcext:value-type="string">
            <text:p>Gewichtung_2</text:p>
          </table:table-cell>
          <table:table-cell table:style-name="ce2" office:value-type="string" calcext:value-type="string">
            <text:p>Antwort_3</text:p>
          </table:table-cell>
          <table:table-cell table:style-name="ce2" office:value-type="string" calcext:value-type="string">
            <text:p>Gewichtung_3</text:p>
          </table:table-cell>
          <table:table-cell table:style-name="ce2" office:value-type="string" calcext:value-type="string">
            <text:p>Antwort_4</text:p>
          </table:table-cell>
          <table:table-cell table:style-name="ce2" office:value-type="string" calcext:value-type="string">
            <text:p>Gewichtung_4</text:p>
          </table:table-cell>
          <table:table-cell table:style-name="ce2" office:value-type="string" calcext:value-type="string">
            <text:p>Antwort_5</text:p>
          </table:table-cell>
          <table:table-cell table:style-name="ce2" office:value-type="string" calcext:value-type="string">
            <text:p>Gewichtung_5</text:p>
          </table:table-cell>
        </table:table-row>
        <table:table-row table:style-name="ro1">
          <table:table-cell table:style-name="ce2" office:value-type="string" calcext:value-type="string">
            <text:p>(Hier steht das Kriterium)</text:p>
          </table:table-cell>
          <table:table-cell table:style-name="ce2" office:value-type="string" calcext:value-type="string">
            <text:p>(Es gibt meistens mehrere Fragen pro Kriterium. Hier steht die Erklärung des Kriteriums. Diese ist dann für alle Fragen zu diesem Kriterium gleich.)</text:p>
          </table:table-cell>
          <table:table-cell table:style-name="ce2" office:value-type="string" calcext:value-type="string">
            <text:p>(Hier steht die Frage)</text:p>
          </table:table-cell>
          <table:table-cell table:style-name="ce2" office:value-type="string" calcext:value-type="string">
            <text:p>(Hier steht die Erklärung zu genau dieser Frage. Bei Bedarf kann sie hier genauer erläutert werden. Zusätzlich können Hilfestellungen gegeben werden, wie man Antworten findet, z.B. eine Google-Suche, spezifisch auf das eingegebene Format vorformuliert. Oder ein Link zur Suche in PRONOM, mit einem Hinweis, in welchem Feld sich die gesuchte Information findet.)</text:p>
          </table:table-cell>
          <table:table-cell table:style-name="ce2" office:value-type="string" calcext:value-type="string">
            <text:p>Antwort 1</text:p>
          </table:table-cell>
          <table:table-cell table:style-name="ce2" office:value-type="float" office:value="0" calcext:value-type="float">
            <text:p>0</text:p>
          </table:table-cell>
          <table:table-cell table:style-name="ce2" office:value-type="string" calcext:value-type="string">
            <text:p>Antwort 2</text:p>
          </table:table-cell>
          <table:table-cell table:style-name="ce2" office:value-type="float" office:value="0" calcext:value-type="float">
            <text:p>0</text:p>
          </table:table-cell>
          <table:table-cell table:style-name="ce2" office:value-type="string" calcext:value-type="string">
            <text:p>Sonstige</text:p>
          </table:table-cell>
          <table:table-cell table:style-name="ce2" office:value-type="float" office:value="0" calcext:value-type="float">
            <text:p>0</text:p>
          </table:table-cell>
          <table:table-cell table:style-name="ce4"/>
          <table:table-cell table:number-columns-repeated="3"/>
        </table:table-row>
        <table:table-row table:style-name="ro2">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able:table-cell>
          <table:table-cell office:value-type="string" calcext:value-type="string">
            <text:p>Ist das Dateiformat offen spezifiziert, d.h. das Recht die Spezifikation zu lesen, anzuwenden und basierend darauf Werkzeuge zu entwickeln, ist nicht eingeschränk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ext:p/>
            <text:p>[Google-Suche: Ist das Dateiformat {selectedFormatName} offen dokumentiert?](https://www.google.com/search?q=Ist das Dateiformat {selectedFormatName} offen dokumentiert?)</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float" office:value="1" calcext:value-type="float">
            <text:p>1</text:p>
          </table:table-cell>
          <table:table-cell office:value-type="float" office:value="0" calcext:value-type="float">
            <text:p>0</text:p>
          </table:table-cell>
          <table:table-cell table:style-name="ce4"/>
          <table:table-cell table:number-columns-repeated="3"/>
        </table:table-row>
        <table:table-row table:style-name="ro3">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Gibt es aktuell verfügbare und lauffähige Validierungswerkzeug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4">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Sind diese Validierungswerkzeuge Open Sourc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5">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Ist das Dateiformat durch eine internationale Standardisierungsorganisation geprüft und als Standard veröffentlich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6">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Ist die Spezifikation kostenfrei zugänglich?</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7">
          <table:table-cell office:value-type="string" calcext:value-type="string">
            <text:p>Offenlegungsgrad</text:p>
          </table:table-cell>
          <table:table-cell office:value-type="string" calcext:value-type="string">
            <text:p>Ist das Dateiformat offen dokumentiert?</text:p>
            <text:p/>
            <text:p>Je weniger dies der Fall ist, desto höher das Risiko, dass ein Dateiformat nicht mehr migrierbar ist, weil keine Konvertierungsprogramme entwickelt werden können.</text:p>
            <text:p/>
            <text:p/>
          </table:table-cell>
          <table:table-cell office:value-type="string" calcext:value-type="string">
            <text:p>Ist die Spezifikation komplett verfügbar?</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Wird das Dateiformat durch Behörden und öffentliche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Wird das Dateiformat auch außerhalb von Behörden und öffentlichen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Wird das Dateiformat aktiv betreu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ce4" office:value-type="string" calcext:value-type="string">
            <text:p>durch Community</text:p>
          </table:table-cell>
          <table:table-cell office:value-type="float" office:value="3" calcext:value-type="float">
            <text:p>3</text:p>
          </table:table-cell>
          <table:table-cell table:style-name="ce4" office:value-type="string" calcext:value-type="string">
            <text:p>durch einzelne, öffentliche Einrichtung</text:p>
          </table:table-cell>
          <table:table-cell office:value-type="float" office:value="2" calcext:value-type="float">
            <text:p>2</text:p>
          </table:table-cell>
          <table:table-cell table:style-name="ce4" office:value-type="string" calcext:value-type="string">
            <text:p>durch einzelne Person</text:p>
          </table:table-cell>
          <table:table-cell office:value-type="float" office:value="1" calcext:value-type="float">
            <text:p>1</text:p>
          </table:table-cell>
          <table:table-cell table:style-name="ce4" office:value-type="string" calcext:value-type="string">
            <text:p>Gar nicht</text:p>
          </table:table-cell>
          <table:table-cell office:value-type="float" office:value="0" calcext:value-type="float">
            <text:p>0</text:p>
          </table:table-cell>
          <table:table-cell table:number-columns-repeated="2"/>
        </table:table-row>
        <table:table-row table:style-name="ro8">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Sind für das Dateiformat verschiedene Anzeigeprogramme verfügbar?</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Adoptionsgrad</text:p>
          </table:table-cell>
          <table:table-cell office:value-type="string" calcext:value-type="string">
            <text:p>Ist das Dateiformat weit verbreitet? </text:p>
            <text:p/>
            <text:p>Je weniger dies der Fall ist, desto höher das Risiko, dass ein Dateiformat nicht mehr migrierbar ist, weil niemand das Dateiformat kennt und es nicht einmal mehr anzeigbar ist.</text:p>
          </table:table-cell>
          <table:table-cell office:value-type="string" calcext:value-type="string">
            <text:p>Hat die Archiv- und Bibliothekscommunity dieses Dateiformat als archivfähiges Datenformat allgemein anerkann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das Dateiformat menschenlesbar und mittels Texteditor anzeig- und bearbeitbar?</text:p>
          </table:table-cell>
          <table:table-cell table:style-name="ce4" office:value-type="string" calcext:value-type="string">
            <text:p>Handelt es sich um eine textbasiertes oder ein Binärformat?</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die verfügbare Spezifikation des Dateiformates detailliert genug, so dass man das Dateiformat mittels Hexeditor in Grundzügen analysieren kann?</text:p>
          </table:table-cell>
          <table:table-cell table:style-name="ce4"/>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Verwendet das Dateiformat Standardzeichen oder andere bekannte Kodierungsmethoden, z. B. UTF-8 für Zeichen bzw. Zahlen nach IEEE?</text:p>
          </table:table-cell>
          <table:table-cell table:style-name="ce4"/>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Software, die das Dateiformat erzeugen kann, für wenig Geld oder sogar kostenlos erhältlich?</text:p>
          </table:table-cell>
          <table:table-cell table:style-name="ce4"/>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Software, die das Dateiformat erzeugen kann, für aktuelle Betriebssysteme verfügbar?</text:p>
          </table:table-cell>
          <table:table-cell table:style-name="ce4"/>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Ist das Dateiformat komprimiert bzw. benutzt es Datenkompression?</text:p>
          </table:table-cell>
          <table:table-cell table:style-name="ce4"/>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Transparenzgrad</text:p>
          </table:table-cell>
          <table:table-cell office:value-type="string" calcext:value-type="string">
            <text:p>Ist es einfach, das Dateiformat zu analysieren?</text:p>
            <text:p/>
            <text:p>Je weniger dies der Fall ist, desto höher ist das Risiko, Dateien nur mit unverhältnismäßig hohem Aufwand analysieren zu können.</text:p>
          </table:table-cell>
          <table:table-cell office:value-type="string" calcext:value-type="string">
            <text:p>Erlaubt das Dateiformat benutzerdefinierte Datenkompression, die zu Veränderungen der essentiellen Charakteristiken, z. B. Kompressionsartefakte, der Datei führen?</text:p>
          </table:table-cell>
          <table:table-cell table:style-name="ce4"/>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Grad der Selbstdokumentation</text:p>
          </table:table-cell>
          <table:table-cell office:value-type="string" calcext:value-type="string">
            <text:p>Ist das Dateiformat selbstdokumentiert?</text:p>
            <text:p/>
            <text:p>Je weniger dies der Fall ist, desto höher ist das Risiko, dass man ohne externe Metadaten eine Datei nicht zuordnen und analysieren kann.</text:p>
          </table:table-cell>
          <table:table-cell office:value-type="string" calcext:value-type="string">
            <text:p>Enthält das Format eine Selbstbeschreibung durch deskriptive Metadaten?</text:p>
          </table:table-cell>
          <table:table-cell table:style-name="ce5" office:value-type="string" calcext:value-type="string">
            <text:p>Deskriptive Metadaten beschreiben den Inhalt eines digitalen Objektes. Bei einem Textdokument wären dies z.B. Informationen zum Autor, eine Inhaltsbeschreibung und Schlagworte.</text:p>
            <text:p/>
            <text:p>[Siehe NESTOR-Wiki](https://wiki.dnb.de/spaces/NESTOR/pages/95651769/Metadaten+Struktur)</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Enthält das Format eine Selbstbeschreibung durch technische Metadaten?</text:p>
          </table:table-cell>
          <table:table-cell table:style-name="ce5" office:value-type="string" calcext:value-type="string">
            <text:p><text:span text:style-name="T1">Technische Metadaten beinhalten unter anderem Angaben über das Dateiformat, über die Datenmenge und über die Software, mit der die Datei erstellt worden ist. [Siehe NESTOR-Wiki](https://wiki.dnb.de/spaces/NESTOR/pages/95651769/Metadaten+Struktur)</text:span></text:p>
            <text:p><text:span text:style-name="T2"/></text:p>
            <text:p><text:span text:style-name="T1">Ein Sonderfall ist das sog. Magic Byte, eine Art von Signatur, die sich meist am Dateianfang befindet, die Tools wie DROID</text:span><text:span text:style-name="T3"> eine einfache Identifikation des Dateiformates erlaubt.</text:span><text:span text:style-name="T4"> </text:span><text:span text:style-name="T5">(zu prüfen – ist das MB ein techn. Metadatum?)</text:spa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Enthält das Format eine Selbstbeschreibung durch administrative Metadaten?</text:p>
          </table:table-cell>
          <table:table-cell table:style-name="ce6" office:value-type="string" calcext:value-type="string">
            <text:p><text:span text:style-name="T6">Administrative Metadaten sind Angaben zum Dateinamen, Speicherort und zur Provenienz.</text:span></text:p>
            <text:p><text:span text:style-name="T6"/></text:p>
            <text:p><text:span text:style-name="T1">[Siehe NESTOR-Wiki](https://wiki.dnb.de/spaces/NESTOR/pages/95651769/Metadaten+Struktur)</text:span></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Liegen diese Metadaten in einem anerkannten, internationalen Metadatenstandard vor?</text:p>
          </table:table-cell>
          <table:table-cell table:style-name="ce7" office:value-type="string" calcext:value-type="string">
            <text:p>(Kontext und Beispiele geb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Sind die Formatmetadaten robust genug für ein akkurate Dateianalyse?</text:p>
          </table:table-cell>
          <table:table-cell table:style-name="ce7" office:value-type="string" calcext:value-type="string">
            <text:p>(Kontext und Beispiele geb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0">
          <table:table-cell office:value-type="string" calcext:value-type="string">
            <text:p>Grad der Selbstdokumentation</text:p>
          </table:table-cell>
          <table:table-cell office:value-type="string" calcext:value-type="string">
            <text:p>Ist das Dateifomat selbstdokumentiert?</text:p>
            <text:p/>
            <text:p>Je weniger dies der Fall ist, desto höher ist das Risiko, dass man ohne externe Metadaten eine Datei nicht zuordnen und analysieren kann.</text:p>
            <text:p/>
            <text:p/>
          </table:table-cell>
          <table:table-cell office:value-type="string" calcext:value-type="string">
            <text:p>Erlaubt das Format den Nachweis der Authentizität durch eingebettete elektronische Signaturen, ohne die Nutzbarkeit einzuschränken?</text:p>
          </table:table-cell>
          <table:table-cell table:style-name="ce7" office:value-type="string" calcext:value-type="string">
            <text:p>(Kontext und Beispiele geb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eine ganz spezielle Hardwareumgebung (z. B. Grafikkarten, Soundkarten, Speicheranforderungen, Blu-Ray-Player, Spielekonsole), um damit zu interagieren, es nutzen und migrieren zu können?</text:p>
          </table:table-cell>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3" calcext:value-type="float">
            <text:p>3</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proprietäre Software, um es anschauen, nutzen und migrieren zu können?</text:p>
          </table:table-cell>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3" calcext:value-type="float">
            <text:p>3</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1">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spezielle Plugins oder Scripte, um es anschauen, nutzen und migrieren zu können?</text:p>
          </table:table-cell>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1">
          <table:table-cell office:value-type="string" calcext:value-type="string">
            <text:p>Grad der Abhängigkeit von externer Hard- und Software</text:p>
          </table:table-cell>
          <table:table-cell office:value-type="string" calcext:value-type="string">
            <text:p>Ist das Dateiformat abhängig von spezifischer Soft- und Hardware?</text:p>
            <text:p/>
            <text:p>Die Fragen helfen, zu ermitteln, ob es sich um ein proprietäres Format handelt. Diese sind mit einem erhöhten Risiko behaftet, dass ein Erhalt der Nutzbarkeit durch Emulation und Formatmigration wegen fehlender Abspielumgebung nicht mehr durchführbar ist.</text:p>
          </table:table-cell>
          <table:table-cell office:value-type="string" calcext:value-type="string">
            <text:p>Benötigt das Dateiformat ein bestimmtes Betriebssystem, um es anschauen, nutzen und migrieren zu können?</text:p>
          </table:table-cell>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1" calcext:value-type="float">
            <text:p>1</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Lizenz- und Patentabhängigkeit</text:p>
          </table:table-cell>
          <table:table-cell office:value-type="string" calcext:value-type="string">
            <text:p>Ist das Dateiformat abhängig von Rechten Dritter?</text:p>
            <text:p/>
            <text:p>Je mehr dies der Fall ist, desto höher ist das Risiko, dass ein Dateiformat nicht mehr migrierbar ist, weil keine Konvertierungsprogramme entwickelt werden dürfen.</text:p>
          </table:table-cell>
          <table:table-cell office:value-type="string" calcext:value-type="string">
            <text:p>Ist das Format Gegenstand von Lizenz- oder Patentansprüchen, die die Entwicklung von Open-Source-Tools zum Öffnen und Verwalten der Dateien behindern könnt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3" calcext:value-type="float">
            <text:p>3</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Lizenz- und Patentabhängigkeit</text:p>
          </table:table-cell>
          <table:table-cell office:value-type="string" calcext:value-type="string">
            <text:p>Ist das Dateiformat abhängig von Rechten Dritter?</text:p>
            <text:p/>
            <text:p>Je mehr dies der Fall ist, desto höher ist das Risiko, dass ein Dateiformat nicht mehr migrierbar ist, weil keine Konvertierungsprogramme entwickelt werden dürfen.</text:p>
          </table:table-cell>
          <table:table-cell office:value-type="string" calcext:value-type="string">
            <text:p>Sind mit dem Format Gebühren verbunden, die sich aus den Lizenz- oder Patentansprüchen ergeb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Lizenz- und Patentabhängigkeit</text:p>
          </table:table-cell>
          <table:table-cell office:value-type="string" calcext:value-type="string">
            <text:p>Ist das Dateiformat abhängig von Rechten Dritter?</text:p>
            <text:p/>
            <text:p>Je mehr dies der Fall ist, desto höher ist das Risiko, dass ein Dateiformat nicht mehr migrierbar ist, weil keine Konvertierungsprogramme entwickelt werden dürfen.</text:p>
          </table:table-cell>
          <table:table-cell office:value-type="string" calcext:value-type="string">
            <text:p>Unterliegt die Formatspezifikation Open-Source-Lizenzbedingung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ce4" office:value-type="string" calcext:value-type="string">
            <text:p>Ja</text:p>
          </table:table-cell>
          <table:table-cell office:value-type="float" office:value="3" calcext:value-type="float">
            <text:p>3</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technischen Schutzmaßnahmen</text:p>
          </table:table-cell>
          <table:table-cell office:value-type="string" calcext:value-type="string">
            <text:p>Ermöglicht das Dateiformat technische Schutzmaßnahmen?</text:p>
            <text:p/>
            <text:p>Je mehr dies der Fall ist, desto höher ist das Risiko, dass ein Dateiformat nicht mehr migrierbar ist, weil keine Konvertierungsprogramme entwickelt werden können.</text:p>
          </table:table-cell>
          <table:table-cell office:value-type="string" calcext:value-type="string">
            <text:p>Verfügt das Format über die Möglichkeit, die gesamte oder einen Teil der resultierenden Datei zu verschlüssel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technischen Schutzmaßnahmen</text:p>
          </table:table-cell>
          <table:table-cell office:value-type="string" calcext:value-type="string">
            <text:p>Ermöglicht das Dateiformat technische Schutzmaßnahmen?</text:p>
            <text:p/>
            <text:p>Je mehr dies der Fall ist, desto höher ist das Risiko, dass ein Dateiformat nicht mehr migrierbar ist, weil keine Konvertierungsprogramme entwickelt werden können.</text:p>
          </table:table-cell>
          <table:table-cell office:value-type="string" calcext:value-type="string">
            <text:p>Erfordert das Format die Verwendung von Verschlüsselung?</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technischen Schutzmaßnahmen</text:p>
          </table:table-cell>
          <table:table-cell office:value-type="string" calcext:value-type="string">
            <text:p>Ermöglicht das Dateiformat technische Schutzmaßnahmen?</text:p>
            <text:p/>
            <text:p>Je mehr dies der Fall ist, desto höher ist das Risiko, dass ein Dateiformat nicht mehr migrierbar ist, weil keine Konvertierungsprogramme entwickelt werden können.</text:p>
          </table:table-cell>
          <table:table-cell office:value-type="string" calcext:value-type="string">
            <text:p>Können technische Schutzmaßnahmen (z. B. Digital Rights Management) angewendet werde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technischen Schutzmaßnahmen</text:p>
          </table:table-cell>
          <table:table-cell office:value-type="string" calcext:value-type="string">
            <text:p>Ermöglicht das Dateiformat technische Schutzmaßnahmen?</text:p>
            <text:p/>
            <text:p>Je mehr dies der Fall ist, desto höher ist das Risiko, dass ein Dateiformat nicht mehr migrierbar ist, weil keine Konvertierungsprogramme entwickelt werden können.</text:p>
          </table:table-cell>
          <table:table-cell office:value-type="string" calcext:value-type="string">
            <text:p>Erlaubt das Format eingebettete Informationen zur Durchsetzbarkeit von Rechtsansprüchen, die die zukünftige Nutzbarkeit gefährden könnten, wie z. B. Wasserzeichen, zeitlich befristete Lizenzschlüssel?</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2">
          <table:table-cell office:value-type="string" calcext:value-type="string">
            <text:p>Grad der Alterung</text:p>
          </table:table-cell>
          <table:table-cell table:style-name="ce1" office:value-type="string" calcext:value-type="string">
            <text:p>Wie veraltet oder wie instabil/unerprobt ist das Dateiformat?</text:p>
            <text:p/>
            <text:p>Die Fragen dienen als Indiz für mögliche Formatobsoleszenz als auch für die Stabilität von Dateiformaten. </text:p>
            <text:p/>
            <text:p>Sie helfen, das Risiko zu bewerten, dass eine Datei nicht gelesen werden kann, weil die Dateiformatspezifikation veraltet oder zu frisch ist. Das geringste Risiko besteht hier für Dateiformate, deren Spezifikation vor längerer Zeit erstmals veröffentlicht wurde und die seitdem aktualisiert wurde.</text:p>
          </table:table-cell>
          <table:table-cell office:value-type="string" calcext:value-type="string">
            <text:p>Wann wurde die Formatspezifikation erstmals erstellt?</text:p>
          </table:table-cell>
          <table:table-cell table:style-name="ce2" office:value-type="string" calcext:value-type="string">
            <text:p>[Google-Suche: Wann wurde die Formatspezifikation für {selectedFormatName} erstmals erstellt?](https://www.google.com/search?q=Wann wurde die Formatspezifikation für {selectedFormatName} erstmals erstellt?)</text:p>
          </table:table-cell>
          <table:table-cell table:style-name="ce2" office:value-type="string" calcext:value-type="string">
            <text:p>vor mehr als 30 Jahren </text:p>
          </table:table-cell>
          <table:table-cell table:style-name="ce2" office:value-type="float" office:value="0" calcext:value-type="float">
            <text:p>0</text:p>
          </table:table-cell>
          <table:table-cell table:style-name="ce2" office:value-type="string" calcext:value-type="string">
            <text:p>vor 20 Jahren</text:p>
          </table:table-cell>
          <table:table-cell table:style-name="ce2" office:value-type="float" office:value="1" calcext:value-type="float">
            <text:p>1</text:p>
          </table:table-cell>
          <table:table-cell table:style-name="ce2" office:value-type="string" calcext:value-type="string">
            <text:p>vor 10 Jahren</text:p>
          </table:table-cell>
          <table:table-cell table:style-name="ce2" office:value-type="float" office:value="2" calcext:value-type="float">
            <text:p>2</text:p>
          </table:table-cell>
          <table:table-cell table:style-name="ce2" office:value-type="string" calcext:value-type="string">
            <text:p>in den letzten 10 Jahren</text:p>
          </table:table-cell>
          <table:table-cell table:style-name="ce2" office:value-type="float" office:value="1" calcext:value-type="float">
            <text:p>1</text:p>
          </table:table-cell>
          <table:table-cell table:style-name="ce2" table:number-columns-repeated="16372"/>
        </table:table-row>
        <table:table-row table:style-name="ro12">
          <table:table-cell office:value-type="string" calcext:value-type="string">
            <text:p>Grad der Alterung</text:p>
          </table:table-cell>
          <table:table-cell table:style-name="ce1" office:value-type="string" calcext:value-type="string">
            <text:p>Wie veraltet oder wie instabil/unerprobt ist das Dateiformat?</text:p>
            <text:p/>
            <text:p>Die Fragen dienen als Indiz für mögliche Formatobsoleszenz als auch für die Stabilität von Dateiformaten. </text:p>
            <text:p/>
            <text:p>Sie helfen, das Risiko zu bewerten, dass eine Datei nicht gelesen werden kann, weil die Dateiformatspezifikation veraltet oder zu frisch ist. Das geringste Risiko besteht hier für Dateiformate, deren Spezifikation vor längerer Zeit erstmals veröffentlicht wurde und die seitdem aktualisiert wurde.</text:p>
          </table:table-cell>
          <table:table-cell office:value-type="string" calcext:value-type="string">
            <text:p>Wann wurde die Formatspezifikation letztmalig aktualisiert?</text:p>
          </table:table-cell>
          <table:table-cell/>
          <table:table-cell table:style-name="ce4" office:value-type="string" calcext:value-type="string">
            <text:p>vor mehr als 30 Jahren </text:p>
          </table:table-cell>
          <table:table-cell office:value-type="float" office:value="0" calcext:value-type="float">
            <text:p>0</text:p>
          </table:table-cell>
          <table:table-cell table:style-name="ce4" office:value-type="string" calcext:value-type="string">
            <text:p>vor 20 Jahren</text:p>
          </table:table-cell>
          <table:table-cell office:value-type="float" office:value="1" calcext:value-type="float">
            <text:p>1</text:p>
          </table:table-cell>
          <table:table-cell table:style-name="ce4" office:value-type="string" calcext:value-type="string">
            <text:p>vor 10 Jahren</text:p>
          </table:table-cell>
          <table:table-cell office:value-type="float" office:value="2" calcext:value-type="float">
            <text:p>2</text:p>
          </table:table-cell>
          <table:table-cell table:style-name="ce4" office:value-type="string" calcext:value-type="string">
            <text:p>in den letzten 10 Jahren</text:p>
          </table:table-cell>
          <table:table-cell office:value-type="float" office:value="3" calcext:value-type="float">
            <text:p>3</text:p>
          </table:table-cell>
          <table:table-cell table:number-columns-repeated="2"/>
        </table:table-row>
        <table:table-row table:style-name="ro12">
          <table:table-cell office:value-type="string" calcext:value-type="string">
            <text:p>Grad der Alterung</text:p>
          </table:table-cell>
          <table:table-cell table:style-name="ce1" office:value-type="string" calcext:value-type="string">
            <text:p>Wie veraltet oder wie instabil/unerprobt ist das Dateiformat?</text:p>
            <text:p/>
            <text:p>Die Fragen dienen als Indiz für mögliche Formatobsoleszenz als auch für die Stabilität von Dateiformaten. </text:p>
            <text:p/>
            <text:p>Sie helfen, das Risiko zu bewerten, dass eine Datei nicht gelesen werden kann, weil die Dateiformatspezifikation veraltet oder zu frisch ist. Das geringste Risiko besteht hier für Dateiformate, deren Spezifikation vor längerer Zeit erstmals veröffentlicht wurde und die seitdem aktualisiert wurde.</text:p>
          </table:table-cell>
          <table:table-cell office:value-type="string" calcext:value-type="string">
            <text:p>Ist die Formatspezifikation unter einem üblichen persistenten Identifier bzw. persistenter URL auffindbar?</text:p>
          </table:table-cell>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3">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Verweist die Spezifikation explizit auf andere Dateiformat-Standard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3">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Erlaubt die Spezifikation Varianten des Dateiformat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3" calcext:value-type="float">
            <text:p>3</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3">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Besteht die Spezifikation aus mehreren Teilspezifikationen, die für sich veröffentlicht wurden und nicht alle aufeinander verweis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3">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Verwendet das Datenformat für Daten und Metadaten ein eingeschränktes, kontrolliertes Vokabular?</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3">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Ist die Formatspezifikation umfangreich?</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weniger als 100 Seiten</text:p>
          </table:table-cell>
          <table:table-cell office:value-type="float" office:value="3" calcext:value-type="float">
            <text:p>3</text:p>
          </table:table-cell>
          <table:table-cell table:style-name="ce4" office:value-type="string" calcext:value-type="string">
            <text:p>weniger als 1000 Seiten</text:p>
          </table:table-cell>
          <table:table-cell office:value-type="float" office:value="2" calcext:value-type="float">
            <text:p>2</text:p>
          </table:table-cell>
          <table:table-cell table:style-name="ce4" office:value-type="string" calcext:value-type="string">
            <text:p>weniger als 5000 Seiten</text:p>
          </table:table-cell>
          <table:table-cell office:value-type="float" office:value="1" calcext:value-type="float">
            <text:p>1</text:p>
          </table:table-cell>
          <table:table-cell table:style-name="ce4" office:value-type="string" calcext:value-type="string">
            <text:p>mehr als 5000 Seiten</text:p>
          </table:table-cell>
          <table:table-cell office:value-type="float" office:value="0" calcext:value-type="float">
            <text:p>0</text:p>
          </table:table-cell>
          <table:table-cell table:number-columns-repeated="2"/>
        </table:table-row>
        <table:table-row table:style-name="ro13">
          <table:table-cell office:value-type="string" calcext:value-type="string">
            <text:p>Komplexitätsgrad</text:p>
          </table:table-cell>
          <table:table-cell office:value-type="string" calcext:value-type="string">
            <text:p>Wie einfach ist das Dateiformat?</text:p>
            <text:p/>
            <text:p>Die Fragen helfen zu evaluiere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Erlaubt die Spezifikation mehrere Kodierungsvarianten von Dat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style-name="ce4"/>
          <table:table-cell table:number-columns-repeated="3"/>
        </table:table-row>
        <table:table-row table:style-name="ro13">
          <table:table-cell office:value-type="string" calcext:value-type="string">
            <text:p>Komplexitätsgrad</text:p>
          </table:table-cell>
          <table:table-cell office:value-type="string" calcext:value-type="string">
            <text:p>Wie einfach ist das Dateiformat?</text:p>
            <text:p/>
            <text:p>Die Fragen helfen, zu ermitteln, wie umfangreich Formatwissen aufgebaut werden muss und wieviel Aufwand für die Fehleranalyse und Entwicklung von Migrationslösungen aufgebracht werden muss. </text:p>
            <text:p/>
            <text:p>Je mehr dies der Fall ist, desto höher ist das Risiko, dass Formatwissen nur mit unverhältnismäßig hohem Aufwand aufgebaut und Dateien nicht hinreichend analysisiert werden können.</text:p>
          </table:table-cell>
          <table:table-cell office:value-type="string" calcext:value-type="string">
            <text:p>Ist das Datenformat multiplex-fähig, sprich: Mit anderen Datenformaten im Bitstrom mischbar, z. B. weil es Datenpaket-orientiert aufgebaut ist (wie z. B. MP3)?</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style-name="ce4"/>
          <table:table-cell table:number-columns-repeated="3"/>
        </table:table-row>
        <table:table-row table:style-name="ro9">
          <table:table-cell office:value-type="string" calcext:value-type="string">
            <text:p>Grad der Robustheit</text:p>
          </table:table-cell>
          <table:table-cell office:value-type="string" calcext:value-type="string">
            <text:p>Wie robust ist das Dateiformat?</text:p>
            <text:p/>
            <text:p>Die Fragen helfen, zu ermittel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Ist das Dateiformat menschenlesbar und mittels Texteditor anzeig- und bearbeit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style-name="ce4"/>
          <table:table-cell table:number-columns-repeated="3"/>
        </table:table-row>
        <table:table-row table:style-name="ro9">
          <table:table-cell office:value-type="string" calcext:value-type="string">
            <text:p>Grad der Robustheit</text:p>
          </table:table-cell>
          <table:table-cell office:value-type="string" calcext:value-type="string">
            <text:p>Wie robust ist das Dateiformat?</text:p>
            <text:p/>
            <text:p>Die Fragen helfen, zu ermittel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Ist das Dateiformat XML-bas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style-name="ce4"/>
          <table:table-cell table:number-columns-repeated="3"/>
        </table:table-row>
        <table:table-row table:style-name="ro9">
          <table:table-cell office:value-type="string" calcext:value-type="string">
            <text:p>Grad der Robustheit</text:p>
          </table:table-cell>
          <table:table-cell office:value-type="string" calcext:value-type="string">
            <text:p>Wie robust ist das Dateiformat?</text:p>
            <text:p/>
            <text:p>Die Fragen helfen, zu ermittel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Verwendet das Dateiformat einen eingeschränkten Bytewerte-Bereich für die Date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style-name="ce4"/>
          <table:table-cell table:number-columns-repeated="3"/>
        </table:table-row>
        <table:table-row table:style-name="ro9">
          <table:table-cell office:value-type="string" calcext:value-type="string">
            <text:p>Grad der Robustheit</text:p>
          </table:table-cell>
          <table:table-cell office:value-type="string" calcext:value-type="string">
            <text:p>Wie robust ist das Dateiformat?</text:p>
            <text:p/>
            <text:p>Die Fragen helfen, zu ermittel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Verwendet das Dateiformat in Voreinstellung Kompressio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style-name="ce4"/>
          <table:table-cell table:number-columns-repeated="3"/>
        </table:table-row>
        <table:table-row table:style-name="ro9">
          <table:table-cell office:value-type="string" calcext:value-type="string">
            <text:p>Grad der Robustheit</text:p>
          </table:table-cell>
          <table:table-cell office:value-type="string" calcext:value-type="string">
            <text:p>Wie robust ist das Dateiformat?</text:p>
            <text:p/>
            <text:p>Die Fragen helfen, zu ermittel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Verwendet das Dateiformat als zentralen Einstiegspunkt den Dateianfang, das Dateiende oder ist es Datenblock-orient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Dateianfang</text:p>
          </table:table-cell>
          <table:table-cell office:value-type="float" office:value="2" calcext:value-type="float">
            <text:p>2</text:p>
          </table:table-cell>
          <table:table-cell table:style-name="ce4" office:value-type="string" calcext:value-type="string">
            <text:p>Dateiende</text:p>
          </table:table-cell>
          <table:table-cell office:value-type="float" office:value="3" calcext:value-type="float">
            <text:p>3</text:p>
          </table:table-cell>
          <table:table-cell table:style-name="ce4" office:value-type="string" calcext:value-type="string">
            <text:p>Datenblock</text:p>
          </table:table-cell>
          <table:table-cell office:value-type="float" office:value="0" calcext:value-type="float">
            <text:p>0</text:p>
          </table:table-cell>
          <table:table-cell table:style-name="ce4" office:value-type="string" calcext:value-type="string">
            <text:p>unbekannt</text:p>
          </table:table-cell>
          <table:table-cell office:value-type="float" office:value="0" calcext:value-type="float">
            <text:p>0</text:p>
          </table:table-cell>
          <table:table-cell table:number-columns-repeated="2"/>
        </table:table-row>
        <table:table-row table:style-name="ro9">
          <table:table-cell office:value-type="string" calcext:value-type="string">
            <text:p>Grad der Robustheit</text:p>
          </table:table-cell>
          <table:table-cell office:value-type="string" calcext:value-type="string">
            <text:p>Wie robust ist das Dateiformat?</text:p>
            <text:p/>
            <text:p>Die Fragen helfen, zu ermittel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die Headerinformationen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style-name="ce4"/>
          <table:table-cell table:number-columns-repeated="3"/>
        </table:table-row>
        <table:table-row table:style-name="ro9">
          <table:table-cell office:value-type="string" calcext:value-type="string">
            <text:p>Grad der Robustheit</text:p>
          </table:table-cell>
          <table:table-cell office:value-type="string" calcext:value-type="string">
            <text:p>Wie robust ist das Dateiformat?</text:p>
            <text:p/>
            <text:p>Die Fragen helfen, zu ermittel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alle Daten außerhalb des Headers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 alle</text:p>
          </table:table-cell>
          <table:table-cell office:value-type="float" office:value="2" calcext:value-type="float">
            <text:p>2</text:p>
          </table:table-cell>
          <table:table-cell table:style-name="ce4" office:value-type="string" calcext:value-type="string">
            <text:p>Ja, nur Metadaten</text:p>
          </table:table-cell>
          <table:table-cell office:value-type="float" office:value="1" calcext:value-type="float">
            <text:p>1</text:p>
          </table:table-cell>
          <table:table-cell table:style-name="ce4" office:value-type="string" calcext:value-type="string">
            <text:p>Ja, nur Nutzdaten</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9" office:value-type="string" calcext:value-type="string">
            <text:p>Sonstige</text:p>
          </table:table-cell>
          <table:table-cell office:value-type="float" office:value="0" calcext:value-type="float">
            <text:p>0</text:p>
          </table:table-cell>
        </table:table-row>
        <table:table-row table:style-name="ro9">
          <table:table-cell office:value-type="string" calcext:value-type="string">
            <text:p>Grad der Robustheit</text:p>
          </table:table-cell>
          <table:table-cell office:value-type="string" calcext:value-type="string">
            <text:p>Wie robust ist das Dateiformat?</text:p>
            <text:p/>
            <text:p>Die Fragen helfen, zu ermittel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1-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Grad der Robustheit</text:p>
          </table:table-cell>
          <table:table-cell office:value-type="string" calcext:value-type="string">
            <text:p>Wie robust ist das Dateiformat?</text:p>
            <text:p/>
            <text:p>Die Fragen helfen, zu ermittel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1-Bitfehler korrigierbar (z. B. bei CRC32)?</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Grad der Robustheit</text:p>
          </table:table-cell>
          <table:table-cell office:value-type="string" calcext:value-type="string">
            <text:p>Wie robust ist das Dateiformat?</text:p>
            <text:p/>
            <text:p>Die Fragen helfen, zu ermitteln, wie gut ein Dateiformat mit fehlerhaften Übertragungen umgehen kann. Je weniger dies der Fall ist, desto höher ist das Risiko, dass Inhalte von beschädigten Dateien nicht wieder hergestellt werden können.</text:p>
          </table:table-cell>
          <table:table-cell office:value-type="string" calcext:value-type="string">
            <text:p>Sind n-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 table:number-rows-repeated="1048518">
          <table:table-cell table:number-columns-repeated="14"/>
        </table:table-row>
        <table:table-row table:style-name="ro1">
          <table:table-cell table:number-columns-repeated="14"/>
        </table:table-row>
      </table:table>
      <table:table table:name="fragen_original" table:style-name="ta2">
        <table:table-column table:style-name="co13" table:default-cell-style-name="ce4"/>
        <table:table-column table:style-name="co14" table:default-cell-style-name="ce3"/>
        <table:table-column table:style-name="co15" table:default-cell-style-name="ce3"/>
        <table:table-column table:style-name="co4" table:default-cell-style-name="ce3"/>
        <table:table-column table:style-name="co5" table:default-cell-style-name="ce8"/>
        <table:table-column table:style-name="co6" table:default-cell-style-name="ce4"/>
        <table:table-column table:style-name="co7" table:default-cell-style-name="ce8"/>
        <table:table-column table:style-name="co8" table:default-cell-style-name="ce4"/>
        <table:table-column table:style-name="co9" table:default-cell-style-name="ce8"/>
        <table:table-column table:style-name="co6" table:default-cell-style-name="ce4"/>
        <table:table-column table:style-name="co10" table:default-cell-style-name="ce8"/>
        <table:table-column table:style-name="co6" table:default-cell-style-name="ce4"/>
        <table:table-column table:style-name="co11" table:default-cell-style-name="ce4"/>
        <table:table-column table:style-name="co6" table:default-cell-style-name="ce4"/>
        <table:table-row table:style-name="ro1">
          <table:table-cell table:style-name="ce2" office:value-type="string" calcext:value-type="string">
            <text:p>Kriterium_deu</text:p>
          </table:table-cell>
          <table:table-cell table:style-name="ce1" office:value-type="string" calcext:value-type="string">
            <text:p>Erklärung_Kriterium_deu</text:p>
          </table:table-cell>
          <table:table-cell table:style-name="ce2" office:value-type="string" calcext:value-type="string">
            <text:p>Frage (deu)</text:p>
          </table:table-cell>
          <table:table-cell table:style-name="ce2" office:value-type="string" calcext:value-type="string">
            <text:p>Erklärung_deu</text:p>
          </table:table-cell>
          <table:table-cell table:style-name="ce2" office:value-type="string" calcext:value-type="string">
            <text:p>Antwort_1</text:p>
          </table:table-cell>
          <table:table-cell table:style-name="ce2" office:value-type="string" calcext:value-type="string">
            <text:p>Gewichtung_1</text:p>
          </table:table-cell>
          <table:table-cell table:style-name="ce2" office:value-type="string" calcext:value-type="string">
            <text:p>Antwort_2</text:p>
          </table:table-cell>
          <table:table-cell table:style-name="ce2" office:value-type="string" calcext:value-type="string">
            <text:p>Gewichtung_2</text:p>
          </table:table-cell>
          <table:table-cell table:style-name="ce2" office:value-type="string" calcext:value-type="string">
            <text:p>Antwort_3</text:p>
          </table:table-cell>
          <table:table-cell table:style-name="ce2" office:value-type="string" calcext:value-type="string">
            <text:p>Gewichtung_3</text:p>
          </table:table-cell>
          <table:table-cell table:style-name="ce2" office:value-type="string" calcext:value-type="string">
            <text:p>Antwort_4</text:p>
          </table:table-cell>
          <table:table-cell table:style-name="ce2" office:value-type="string" calcext:value-type="string">
            <text:p>Gewichtung_4</text:p>
          </table:table-cell>
          <table:table-cell table:style-name="ce9" office:value-type="string" calcext:value-type="string">
            <text:p>Antwort_5</text:p>
          </table:table-cell>
          <table:table-cell table:style-name="ce9" office:value-type="string" calcext:value-type="string">
            <text:p>Gewichtung_5</text:p>
          </table:table-cell>
        </table:table-row>
        <table:table-row table:style-name="ro14">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as Dateiformat offen spezifiziert, d.h. das Recht die Spezifikation zu lesen, anzuwenden und basierend darauf Werkzeuge zu entwickeln, ist nicht eingeschränk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style-name="ce4"/>
          <table:table-cell table:number-columns-repeated="3"/>
        </table:table-row>
        <table:table-row table:style-name="ro3">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Gibt es aktuell verfügbare und lauffähige Validierungswerkzeug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4">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Sind diese Validierungswerkzeuge Open Source?</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5">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as Dateiformat durch eine internationale Standardisierungsorganisation geprüft und als Standard veröffentlicht?</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6">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ie Spezifikation kostenfrei zugänglich?</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7">
          <table:table-cell office:value-type="string" calcext:value-type="string">
            <text:p>Offenlegungsgrad (offen)</text:p>
          </table:table-cell>
          <table:table-cell office:value-type="string" calcext:value-type="string">
            <text:p>Dieses Kriterium ermittelt, inwieweit ein Dateiformat offen dokumentiert ist. Je niedriger die Punktzahl, desto höher das Risiko, dass ein Dateiformat nicht mehr migrierbar ist, weil keine Konvertierungsprogramme entwickelt werden können.</text:p>
          </table:table-cell>
          <table:table-cell office:value-type="string" calcext:value-type="string">
            <text:p>Ist die Spezifikation komplett verfügbar?</text:p>
          </table:table-cell>
          <table:table-cell office:value-type="string" calcext:value-type="string">
            <text:p>Die offene Standardisierung von Dateiformaten erlaubt es im Fall der Formatobsoleszenz, Lese- und Konvertierungsprogramme neu zu erstellen.</text:p>
            <text:p/>
            <text:p>Sinnvoll ist es, wenn Dateiformate vollständig spezifiziert sind und nicht auf andere Dokumente angewiesen sind. Dies erhöht die Chance, Lese- und Konvertierungsprogramme nur anhand der vorhandenen Spezifikation zu erstellen.</text:p>
            <text:p/>
            <text:p>Für Dateiformate in der digitalen Langzeitarchivierung sollten geeignete Validatoren oder zumindest Referenzimplementierungen zur Verfügung stehen, die eine Beurteilung ermöglichen, inwieweit Dateien von Programmen interpretiert werden können.</text:p>
            <text:p/>
            <text:p>Proprietäre Datenformate halten diesen Anforderungen nicht stand.</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5">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durch Behörden und öffentliche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5">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auch außerhalb von Behörden und öffentlichen Einrichtungen häufig verwende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5">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Wird das Dateiformat aktiv betreu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office:value-type="string" calcext:value-type="string">
            <text:p>durch Community</text:p>
          </table:table-cell>
          <table:table-cell table:style-name="ce8" office:value-type="float" office:value="3" calcext:value-type="float">
            <text:p>3</text:p>
          </table:table-cell>
          <table:table-cell office:value-type="string" calcext:value-type="string">
            <text:p>durch einzelne, öffentliche Einrichtung</text:p>
          </table:table-cell>
          <table:table-cell table:style-name="ce8" office:value-type="float" office:value="2" calcext:value-type="float">
            <text:p>2</text:p>
          </table:table-cell>
          <table:table-cell office:value-type="string" calcext:value-type="string">
            <text:p>durch einzelne Person</text:p>
          </table:table-cell>
          <table:table-cell table:style-name="ce8" office:value-type="float" office:value="1" calcext:value-type="float">
            <text:p>1</text:p>
          </table:table-cell>
          <table:table-cell office:value-type="string" calcext:value-type="string">
            <text:p>Gar nicht</text:p>
          </table:table-cell>
          <table:table-cell table:style-name="ce8" office:value-type="float" office:value="0" calcext:value-type="float">
            <text:p>0</text:p>
          </table:table-cell>
          <table:table-cell table:number-columns-repeated="2"/>
        </table:table-row>
        <table:table-row table:style-name="ro15">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Sind für das Dateiformat verschiedene Anzeigeprogramme verfügbar?</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5">
          <table:table-cell office:value-type="string" calcext:value-type="string">
            <text:p>Adoptionsgrad (verbreitet)</text:p>
          </table:table-cell>
          <table:table-cell office:value-type="string" calcext:value-type="string">
            <text:p>Dieses Kriterium definiert inwieweit ein Dateiformat verbreitet ist. Je niedriger die Punktzahl, desto höher das Risiko, dass ein Dateiformat nicht mehr migrierbar ist, weil niemand das Dateiformat kennt und es nicht einmal mehr anzeigbar ist.</text:p>
          </table:table-cell>
          <table:table-cell office:value-type="string" calcext:value-type="string">
            <text:p>Hat die Archiv- und Bibliothekscommunity dieses Dateiformat als archivfähiges Datenformat allgemein anerkannt?</text:p>
          </table:table-cell>
          <table:table-cell office:value-type="string" calcext:value-type="string">
            <text:p>Weitverbreitete Dateiformate bringen es mit sich, dass das Formatwissen über diese stärker verbreitet und für die Nachwelt eher dokumentiert ist. Hinzu kommt, dass die Verfügbarkeit von geeigneter Software mit hoher Wahrscheinlichkeit länger gegeben ist.</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6">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as Dateiformat menschenlesbar und mittels Texteditor anzeig- und bearbeitbar?</text:p>
          </table:table-cell>
          <table:table-cell table:style-name="ce4"/>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6">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ie verfügbare Spezifikation des Dateiformates detailliert genug, so dass man das Dateiformat mittels Hexeditor in Grundzügen analysieren kann?</text:p>
          </table:table-cell>
          <table:table-cell table:style-name="ce4"/>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6">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Verwendet das Dateiformat Standardzeichen oder andere bekannte Kodierungsmethoden, z. B. UTF8 für Zeichen bzw. Zahlen nach IEEE?</text:p>
          </table:table-cell>
          <table:table-cell table:style-name="ce4"/>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6">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Software, die das Dateiformat erzeugen kann, für wenig Geld oder gar kostenlos erhältlich?</text:p>
          </table:table-cell>
          <table:table-cell table:style-name="ce4"/>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6">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Software, die das Dateiformat erzeugen kann, für aktuelle Computerplattformen verfügbar?</text:p>
          </table:table-cell>
          <table:table-cell table:style-name="ce4"/>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6">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Ist das Dateiformat komprimiert bzw. benutzt es Datenkompression?</text:p>
          </table:table-cell>
          <table:table-cell table:style-name="ce4"/>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6">
          <table:table-cell office:value-type="string" calcext:value-type="string">
            <text:p>Transparenzgrad (transparent)</text:p>
          </table:table-cell>
          <table:table-cell office:value-type="string" calcext:value-type="string">
            <text:p>Dieses Kriterium definiert die einfache Durchführbarkeit von Analysen. Je niedriger die Punktezahl, desto höher ist das Risiko Dateien nur mit unverhältnismäßig hohem Aufwand analysieren zu können.</text:p>
          </table:table-cell>
          <table:table-cell office:value-type="string" calcext:value-type="string">
            <text:p>Erlaubt das Dateiformat nutzerdefinierte Datenkompression, die zu Veränderungen der essentiellen Charakteristiken, z. B. Kompressionsartefakte, der Datei führen?</text:p>
          </table:table-cell>
          <table:table-cell table:style-name="ce4"/>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deskriptive Metadaten?</text:p>
          </table:table-cell>
          <table:table-cell office:value-type="string" calcext:value-type="string">
            <text:p><text:span text:style-name="T2">Unter selbstdokumentierenden Dateiformaten versteht man jene, die über eine bestimmte Signatur (magic byte, meist am Dateianfang) eine einfache Identifikation des Dateiformates erlauben.</text:span><text:span text:style-name="T4"> </text:span></text:p>
            <text:p><text:span text:style-name="T2"/></text:p>
            <text:p><text:span text:style-name="T7">(‼️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technische Metadaten?</text:p>
          </table:table-cell>
          <table:table-cell office:value-type="string" calcext:value-type="string">
            <text:p><text:span text:style-name="T2">Unter selbstdokumentierenden Dateiformaten versteht man jene, die über eine bestimmte Signatur (magic byte, meist am Dateianfang) eine einfache Identifikation des Dateiformates erlauben.</text:span><text:span text:style-name="T4"> </text:span></text:p>
            <text:p><text:span text:style-name="T2"/></text:p>
            <text:p><text:span text:style-name="T7">(‼️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nthält das Format eine Selbstbeschreibung durch administrative Metadaten?</text:p>
          </table:table-cell>
          <table:table-cell office:value-type="string" calcext:value-type="string">
            <text:p><text:span text:style-name="T2">Unter selbstdokumentierenden Dateiformaten versteht man jene, die über eine bestimmte Signatur (magic byte, meist am Dateianfang) eine einfache Identifikation des Dateiformates erlauben.</text:span><text:span text:style-name="T4"> </text:span></text:p>
            <text:p><text:span text:style-name="T2"/></text:p>
            <text:p><text:span text:style-name="T7">(‼️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Liegen diese Metadaten in einem anerkannten, internationalen Metadatenstandard vor?</text:p>
          </table:table-cell>
          <table:table-cell office:value-type="string" calcext:value-type="string">
            <text:p><text:span text:style-name="T2">Unter selbstdokumentierenden Dateiformaten versteht man jene, die über eine bestimmte Signatur (magic byte, meist am Dateianfang) eine einfache Identifikation des Dateiformates erlauben.</text:span><text:span text:style-name="T4"> </text:span></text:p>
            <text:p><text:span text:style-name="T2"/></text:p>
            <text:p><text:span text:style-name="T7">(‼️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Sind die Formatmetadaten robust genug für ein akkurate Dateianalyse?</text:p>
          </table:table-cell>
          <table:table-cell office:value-type="string" calcext:value-type="string">
            <text:p><text:span text:style-name="T2">Unter selbstdokumentierenden Dateiformaten versteht man jene, die über eine bestimmte Signatur (magic byte, meist am Dateianfang) eine einfache Identifikation des Dateiformates erlauben.</text:span><text:span text:style-name="T4"> </text:span></text:p>
            <text:p><text:span text:style-name="T2"/></text:p>
            <text:p><text:span text:style-name="T7">(‼️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0">
          <table:table-cell office:value-type="string" calcext:value-type="string">
            <text:p>Grad der Selbstdokumentation (selbstdokumentiert)</text:p>
          </table:table-cell>
          <table:table-cell office:value-type="string" calcext:value-type="string">
            <text:p>Dieses Kriterium definiert, inwieweit das Dateifomat selbstdokumentiert ist. Je niedriger die Punktzahl, desto höher das Risiko, dass man ohne externe Metadaten eine Datei nicht zuordnen und analysieren kann.</text:p>
          </table:table-cell>
          <table:table-cell office:value-type="string" calcext:value-type="string">
            <text:p>Erlaubt das Format den Nachweis der Authentizität durch eingebettete elektronische Signaturen, ohne die Nutzbarkeit einzuschränken?</text:p>
          </table:table-cell>
          <table:table-cell office:value-type="string" calcext:value-type="string">
            <text:p><text:span text:style-name="T2">Unter selbstdokumentierenden Dateiformaten versteht man jene, die über eine bestimmte Signatur (magic byte, meist am Dateianfang) eine einfache Identifikation des Dateiformates erlauben.</text:span><text:span text:style-name="T4"> </text:span></text:p>
            <text:p><text:span text:style-name="T2"/></text:p>
            <text:p><text:span text:style-name="T7">(‼️ hier ist der Erklärtext nicht ausreichend. Er erwähnt nur ein Beispiel für technische Metadaten (magic byte). Gibt es andere Arten der Selbstdokumentation? Weitere Fragen beziehen sich auf deskriptive und/oder administrative Metadaten.)</text:spa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eine ganz spezielle Hardwareumgebung (z. B. Grafikkarten, Soundkarten, Speicheranforderungen, Blu-Ray-Player, Spielekonsole), um damit zu interagieren, es nutzen und migrieren zu können?</text:p>
          </table:table-cell>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3" calcext:value-type="float">
            <text:p>3</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proprietäre Software, um es anschauen, nutzen und migrieren zu können?</text:p>
          </table:table-cell>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3" calcext:value-type="float">
            <text:p>3</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spezielle Plugins oder Scripte, um es anschauen, nutzen und migrieren zu können?</text:p>
          </table:table-cell>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Abhängigkeit von externer Hard- und Software (technologieunabhängig)</text:p>
          </table:table-cell>
          <table:table-cell office:value-type="string" calcext:value-type="string">
            <text:p>Dieses Kriterium definiert die Unabhängigkeit von spezifischer Soft- und Hardware und ist ein Indiz für proprietäre Formate. Je niedriger die Punktezahl, desto höher das Risiko, dass ein Erhalt der Nutzbarkeit durch Emulation und Formatmigration wegen fehlender Abspielumgebung nicht mehr durchführbar sind.</text:p>
          </table:table-cell>
          <table:table-cell office:value-type="string" calcext:value-type="string">
            <text:p>Benötigt das Dateiformat ein bestimmtes Betriebssystem, um es anschauen, nutzen und migrieren zu können?</text:p>
          </table:table-cell>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1" calcext:value-type="float">
            <text:p>1</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Ist das Format Gegenstand von Lizenz- oder Patentansprüchen, die die Entwicklung von Open-Source-Tools zum Öffnen und Verwalten der Dateien behindern könnt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3" calcext:value-type="float">
            <text:p>3</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Sind mit dem Format Gebühren verbunden, die sich aus den Lizenz- oder Patentansprüchen ergeb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Lizenz- und Patentabhängigkeit (rechte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Unterliegt die Formatspezifikation Open-Source-Lizenzbedingungen?</text:p>
          </table:table-cell>
          <table:table-cell office:value-type="string" calcext:value-type="string">
            <text:p>Lizenzbehaftete, proprietäre Spezifikationen erschweren den Erhalt, da eine Sicherung der Spezifikationsdokumente notwendig ist und Lizenzgeber über die Zeit nicht mehr verfügbar sein können.</text:p>
          </table:table-cell>
          <table:table-cell table:style-name="ce4" office:value-type="string" calcext:value-type="string">
            <text:p>Ja</text:p>
          </table:table-cell>
          <table:table-cell office:value-type="float" office:value="3" calcext:value-type="float">
            <text:p>3</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Verfügt das Format über die Möglichkeit, die gesamte oder einen Teil der resultierenden Datei zu verschlüssel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Erfordert das Format die Verwendung von Verschlüsselung?</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Können technische Schutzmaßnahmen (z. B. Digital Rights Management) angewendet werden?</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technischen Schutzmaßnahmen (drmfrei)</text:p>
          </table:table-cell>
          <table:table-cell office:value-type="string" calcext:value-type="string">
            <text:p>Dieses Kriterium definiert das Risiko der Behinderungen von Eigenentwicklungen für die Formatmigration. je niedriger die Punktezahl, desto höher das Risiko, dass ein Dateiformat nicht mehr migrierbar ist, weil keine Konvertierungsprogramme entwickelt werden können.</text:p>
          </table:table-cell>
          <table:table-cell office:value-type="string" calcext:value-type="string">
            <text:p>Erlaubt das Format eingebettete Informationen zur Durchsetzbarkeit von Rechtsansprüchen, die die zukünftige Nutzbarkeit gefährden könnten, wie z. B. Wasserzeichen, zeitlich befristete Lizenzschlüssel?</text:p>
          </table:table-cell>
          <table:table-cell office:value-type="string" calcext:value-type="string">
            <text:p>Dateiformate sollten keine Zugriffsschutzmechanismen enthalten, da der Zugriff auf den Inhalt über die Zeit verloren gehen kann (oder gar nicht möglich ist).</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Wann wurde die Formatspezifikation erstmals erstellt?</text:p>
          </table:table-cell>
          <table:table-cell/>
          <table:table-cell office:value-type="string" calcext:value-type="string">
            <text:p>vor mehr als 30 Jahren </text:p>
          </table:table-cell>
          <table:table-cell table:style-name="ce8" office:value-type="float" office:value="0" calcext:value-type="float">
            <text:p>0</text:p>
          </table:table-cell>
          <table:table-cell office:value-type="string" calcext:value-type="string">
            <text:p>vor 20 Jahren</text:p>
          </table:table-cell>
          <table:table-cell table:style-name="ce8" office:value-type="float" office:value="1" calcext:value-type="float">
            <text:p>1</text:p>
          </table:table-cell>
          <table:table-cell office:value-type="string" calcext:value-type="string">
            <text:p>vor 10 Jahren</text:p>
          </table:table-cell>
          <table:table-cell table:style-name="ce8" office:value-type="float" office:value="2" calcext:value-type="float">
            <text:p>2</text:p>
          </table:table-cell>
          <table:table-cell office:value-type="string" calcext:value-type="string">
            <text:p>in den letzten 10 Jahren</text:p>
          </table:table-cell>
          <table:table-cell table:style-name="ce8" office:value-type="float" office:value="1" calcext:value-type="float">
            <text:p>1</text:p>
          </table:table-cell>
          <table:table-cell table:number-columns-repeated="2"/>
        </table:table-row>
        <table:table-row table:style-name="ro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Wann wurde die Formatspezifikation letztmalig aktualisiert?</text:p>
          </table:table-cell>
          <table:table-cell/>
          <table:table-cell office:value-type="string" calcext:value-type="string">
            <text:p>vor mehr als 30 Jahren </text:p>
          </table:table-cell>
          <table:table-cell table:style-name="ce8" office:value-type="float" office:value="0" calcext:value-type="float">
            <text:p>0</text:p>
          </table:table-cell>
          <table:table-cell office:value-type="string" calcext:value-type="string">
            <text:p>vor 20 Jahren</text:p>
          </table:table-cell>
          <table:table-cell table:style-name="ce8" office:value-type="float" office:value="1" calcext:value-type="float">
            <text:p>1</text:p>
          </table:table-cell>
          <table:table-cell office:value-type="string" calcext:value-type="string">
            <text:p>vor 10 Jahren</text:p>
          </table:table-cell>
          <table:table-cell table:style-name="ce8" office:value-type="float" office:value="2" calcext:value-type="float">
            <text:p>2</text:p>
          </table:table-cell>
          <table:table-cell office:value-type="string" calcext:value-type="string">
            <text:p>in den letzten 10 Jahren</text:p>
          </table:table-cell>
          <table:table-cell table:style-name="ce8" office:value-type="float" office:value="3" calcext:value-type="float">
            <text:p>3</text:p>
          </table:table-cell>
          <table:table-cell table:number-columns-repeated="2"/>
        </table:table-row>
        <table:table-row table:style-name="ro8">
          <table:table-cell office:value-type="string" calcext:value-type="string">
            <text:p>Grad der Alterung (aktuell)</text:p>
          </table:table-cell>
          <table:table-cell office:value-type="string" calcext:value-type="string">
            <text:p>Dieses Kriterium ist sowohl ein Indiz für mögliche Formatobsoleszenz als auch für die Stabilität von Dateiformaten. Je niedriger die Punktezahl, desto höher das Risiko, dass eine Datei nicht gelesen werden kann, weil die Dateiformatspezifikation veraltet oder zu frisch ist.</text:p>
          </table:table-cell>
          <table:table-cell office:value-type="string" calcext:value-type="string">
            <text:p>Ist die Formatspezifikation unter einem üblichen persistenten Identifier bzw. persistenter URL auffindbar?</text:p>
          </table:table-cell>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Verweist die Spezifikation explizit auf andere Dateiformat-Standard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Erlaubt die Spezifikation Varianten des Dateiformats?</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3" calcext:value-type="float">
            <text:p>3</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Besteht die Spezifikation aus mehreren Teilspezifikationen, die für sich veröffentlicht wurden und nicht alle aufeinander verweis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Verwendet das Datenformat für Daten und Metadaten ein eingeschränktes, kontrolliertes Vokabular?</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Ist die Formatspezifikation umfangreich??</text:p>
          </table:table-cell>
          <table:table-cell office:value-type="string" calcext:value-type="string">
            <text:p>Die geringe Komplexität eines Dateiformates geht oft mit einer besseren Verständlichkeit und einer weniger fehleranfälligen Implementierung einher.</text:p>
          </table:table-cell>
          <table:table-cell office:value-type="string" calcext:value-type="string">
            <text:p>weniger als 100 Seiten</text:p>
          </table:table-cell>
          <table:table-cell table:style-name="ce8" office:value-type="float" office:value="3" calcext:value-type="float">
            <text:p>3</text:p>
          </table:table-cell>
          <table:table-cell office:value-type="string" calcext:value-type="string">
            <text:p>weniger als 1000 Seiten</text:p>
          </table:table-cell>
          <table:table-cell table:style-name="ce8" office:value-type="float" office:value="2" calcext:value-type="float">
            <text:p>2</text:p>
          </table:table-cell>
          <table:table-cell office:value-type="string" calcext:value-type="string">
            <text:p>weniger als 5000 Seiten</text:p>
          </table:table-cell>
          <table:table-cell table:style-name="ce8" office:value-type="float" office:value="1" calcext:value-type="float">
            <text:p>1</text:p>
          </table:table-cell>
          <table:table-cell office:value-type="string" calcext:value-type="string">
            <text:p>mehr als 5000 Seiten</text:p>
          </table:table-cell>
          <table:table-cell table:style-name="ce8" office:value-type="float" office:value="0" calcext:value-type="float">
            <text:p>0</text:p>
          </table:table-cell>
          <table:table-cell table:number-columns-repeated="2"/>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Erlaubt die Spezifikation mehrere Kodierungsvarianten von Daten?</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9">
          <table:table-cell office:value-type="string" calcext:value-type="string">
            <text:p>Komplexitätsgrad (einfach)</text:p>
          </table:table-cell>
          <table:table-cell office:value-type="string" calcext:value-type="string">
            <text:p>Dieses Kriterium definiert, wie umfangreich Formatwissen aufgebaut werden muss und wieviel Aufwand für die Fehleranalyse und Entwicklung von Migrationslösungen aufgebracht werden muss. Je niedriger die Punktezahl, desto höher das Risiko, dass Formatwissen nur mit unverhältnismäßig hohem Aufwand aufgebaut und Dateien nicht hinreichend analysisiert werden können.</text:p>
          </table:table-cell>
          <table:table-cell office:value-type="string" calcext:value-type="string">
            <text:p>Ist das Datenformat multiplex-fähig, sprich: Mit anderen Datenformaten im Bitstrom mischbar, z. B. weil es Datenpaket-orientiert aufgebaut ist (wie z. B. MP3)?</text:p>
          </table:table-cell>
          <table:table-cell office:value-type="string" calcext:value-type="string">
            <text:p>Die geringe Komplexität eines Dateiformates geht oft mit einer besseren Verständlichkeit und einer weniger fehleranfälligen Implementierung einher.</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Ist das Dateiformat menschenlesbar und mittels Texteditor anzeig- und bearbeit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Ist das Dateiformat XML-bas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einen eingeschränkten Bytewerte-Bereich für die Date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1" calcext:value-type="float">
            <text:p>1</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in Voreinstellung Kompression?</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0" calcext:value-type="float">
            <text:p>0</text:p>
          </table:table-cell>
          <table:table-cell table:style-name="ce4" office:value-type="string" calcext:value-type="string">
            <text:p>Nein</text:p>
          </table:table-cell>
          <table:table-cell office:value-type="float" office:value="2" calcext:value-type="float">
            <text:p>2</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Verwendet das Dateiformat als zentralen Einstiegspunkt den Dateianfang, das Dateiende oder ist es Datenblock-orienti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Dateianfang</text:p>
          </table:table-cell>
          <table:table-cell table:style-name="ce8" office:value-type="float" office:value="2" calcext:value-type="float">
            <text:p>2</text:p>
          </table:table-cell>
          <table:table-cell office:value-type="string" calcext:value-type="string">
            <text:p>Dateiende</text:p>
          </table:table-cell>
          <table:table-cell table:style-name="ce8" office:value-type="float" office:value="3" calcext:value-type="float">
            <text:p>3</text:p>
          </table:table-cell>
          <table:table-cell office:value-type="string" calcext:value-type="string">
            <text:p>Datenblock</text:p>
          </table:table-cell>
          <table:table-cell table:style-name="ce8" office:value-type="float" office:value="0" calcext:value-type="float">
            <text:p>0</text:p>
          </table:table-cell>
          <table:table-cell office:value-type="string" calcext:value-type="string">
            <text:p>unbekannt</text:p>
          </table:table-cell>
          <table:table-cell table:style-name="ce8" office:value-type="float" office:value="0" calcext:value-type="float">
            <text:p>0</text:p>
          </table:table-cell>
          <table:table-cell table:number-columns-repeated="2"/>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die Headerinformationen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0" calcext:value-type="float">
            <text:p>0</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alle Daten außerhalb des Headers durch Prüfsummen gesichert?</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office:value-type="string" calcext:value-type="string">
            <text:p>Ja, alle</text:p>
          </table:table-cell>
          <table:table-cell table:style-name="ce8" office:value-type="float" office:value="2" calcext:value-type="float">
            <text:p>2</text:p>
          </table:table-cell>
          <table:table-cell office:value-type="string" calcext:value-type="string">
            <text:p>Ja, nur Metadaten</text:p>
          </table:table-cell>
          <table:table-cell table:style-name="ce8" office:value-type="float" office:value="1" calcext:value-type="float">
            <text:p>1</text:p>
          </table:table-cell>
          <table:table-cell office:value-type="string" calcext:value-type="string">
            <text:p>Ja, nur Nutzdaten</text:p>
          </table:table-cell>
          <table:table-cell table:style-name="ce8" office:value-type="float" office:value="2" calcext:value-type="float">
            <text:p>2</text:p>
          </table:table-cell>
          <table:table-cell office:value-type="string" calcext:value-type="string">
            <text:p>Nein</text:p>
          </table:table-cell>
          <table:table-cell table:style-name="ce8" office:value-type="float" office:value="0" calcext:value-type="float">
            <text:p>0</text:p>
          </table:table-cell>
          <table:table-cell table:style-name="ce9" office:value-type="string" calcext:value-type="string">
            <text:p>Sonstige</text:p>
          </table:table-cell>
          <table:table-cell table:style-name="ce8" office:value-type="float" office:value="0" calcext:value-type="float">
            <text:p>0</text:p>
          </table:table-cell>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1-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1-Bitfehler korrigierbar (z. B. bei CRC32)?</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8">
          <table:table-cell office:value-type="string" calcext:value-type="string">
            <text:p>Grad der Robustheit (robust)</text:p>
          </table:table-cell>
          <table:table-cell office:value-type="string" calcext:value-type="string">
            <text:p>Dieses Kriterium definiert, wie gut ein Dateiformat mit fehlerhaften Übertragungen umgehen kann. Je niedriger die Punktezahl, desto höher das Risiko, dass Inhalte von beschädigten Dateien nicht wieder hergestellt werden können.</text:p>
          </table:table-cell>
          <table:table-cell office:value-type="string" calcext:value-type="string">
            <text:p>Sind n-Bitfehler erkennbar?</text:p>
          </table:table-cell>
          <table:table-cell office:value-type="string" calcext:value-type="string">
            <text:p>Dateiformate sind dann robust, wenn sich einzelne Bitfehler auf den Inhalt der Datei nur gering oder gar nicht auswirken. Aus diesem Grund wird oft von komprimierten Datenformaten abgeraten. Wenn, wie im Falle des Videodatenformates Matroska/FFV1, verlustfreie Datenkompression mit dem gezielten Hinzufügen von Redundanz, z. B. durch CRC, kombiniert wird, kann die Forderung nach Robustheit erfüllt werden.</text:p>
          </table:table-cell>
          <table:table-cell table:style-name="ce4" office:value-type="string" calcext:value-type="string">
            <text:p>Ja</text:p>
          </table:table-cell>
          <table:table-cell office:value-type="float" office:value="2" calcext:value-type="float">
            <text:p>2</text:p>
          </table:table-cell>
          <table:table-cell table:style-name="ce4" office:value-type="string" calcext:value-type="string">
            <text:p>Nein</text:p>
          </table:table-cell>
          <table:table-cell office:value-type="float" office:value="0" calcext:value-type="float">
            <text:p>0</text:p>
          </table:table-cell>
          <table:table-cell table:style-name="ce4" office:value-type="string" calcext:value-type="string">
            <text:p>Sonstige</text:p>
          </table:table-cell>
          <table:table-cell office:value-type="float" office:value="1" calcext:value-type="float">
            <text:p>1</text:p>
          </table:table-cell>
          <table:table-cell table:number-columns-repeated="4"/>
        </table:table-row>
        <table:table-row table:style-name="ro1" table:number-rows-repeated="1048519">
          <table:table-cell table:number-columns-repeated="14"/>
        </table:table-row>
        <table:table-row table:style-name="ro1">
          <table:table-cell table:number-columns-repeated="14"/>
        </table:table-row>
      </table:table>
      <table:named-expressions/>
      <table:database-ranges>
        <table:database-range table:name="__Anonymous_Sheet_DB__0" table:target-range-address="'fragen_judge_fileformat-03'.A1:'fragen_judge_fileformat-03'.N57" table:display-filter-buttons="true"/>
        <table:database-range table:name="__Anonymous_Sheet_DB__1" table:target-range-address="fragen_original.A1:fragen_original.N5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ans" svg:font-family="'Ubuntu Sans'"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9P0" style:volatile="true">
      <number:currency-symbol number:language="de" number:country="AT">€</number:currency-symbol>
      <number:text> </number:text>
      <number:number number:decimal-places="2" number:min-decimal-places="2" number:min-integer-digits="1" number:grouping="true"/>
    </number:currency-style>
    <number:currency-style style:name="N119">
      <style:text-properties fo:color="#ff0000"/>
      <number:text>-</number:text>
      <number:currency-symbol number:language="de" number:country="AT">€</number:currency-symbol>
      <number:text> </number:text>
      <number:number number:decimal-places="2" number:min-decimal-places="2" number:min-integer-digits="1" number:grouping="true"/>
      <style:map style:condition="value()&gt;=0" style:apply-style-name="N119P0"/>
    </number:currency-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number:text>
      <number:fill-character> </number:fill-character>
      <number:number number:decimal-places="0" number:min-decimal-places="0" number:min-integer-digits="1" number:grouping="true"/>
      <number:text loext:blank-width-char="-"> </number:text>
    </number:number-style>
    <number:number-style style:name="N129P2" style:volatile="true">
      <number:text loext:blank-width-char="-"> </number:text>
      <number:fill-character> </number:fill-character>
      <number:text loext:blank-width-char="-1">-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0P1" style:volatile="true">
      <number:text>-£</number:text>
      <number:fill-character> </number:fill-character>
      <number:number number:decimal-places="0" number:min-decimal-places="0" number:min-integer-digits="1" number:grouping="true"/>
      <number:text loext:blank-width-char="-"> </number:text>
    </number:number-style>
    <number:number-style style:name="N130P2" style:volatile="true">
      <number:text loext:blank-width-char="-"> £</number:text>
      <number:fill-character> </number:fill-character>
      <number:text loext:blank-width-char="-1">-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number:text>
      <number:fill-character> </number:fill-character>
      <number:number number:decimal-places="2" number:min-decimal-places="2" number:min-integer-digits="1" number:grouping="true"/>
      <number:text loext:blank-width-char="-">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ragen_5f_original" style:display-name="PageStyle_fragen_original"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fragen_5f_judge_5f_fileformat-03" style:display-name="PageStyle_fragen_judge_fileformat-03"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GB</dc:language>
    <dc:date>2026-07-21T18:33:39</dc:date>
    <meta:editing-cycles>39</meta:editing-cycles>
    <meta:editing-duration>PT6H27M</meta:editing-duration>
    <meta:generator>LibreOffice/26.2.4.2$Linux_X86_64 LibreOffice_project/620$Build-2</meta:generator>
    <meta:document-statistic meta:table-count="2" meta:cell-count="1140" meta:object-count="0"/>
    <meta:user-defined meta:name="AppVersion">15.0000</meta:user-defined>
  </office:meta>
</office:document-meta>
</file>